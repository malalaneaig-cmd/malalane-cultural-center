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Consolas" svg:font-family="Consolas" style:font-family-generic="modern" style:font-pitch="fixed" svg:panose-1="2 11 6 9 2 2 4 3 2 4"/>
  </office:font-face-decls>
  <office:automatic-styles>
    <style:style style:name="P1" style:parent-style-name="Heading2" style:master-page-name="MP0" style:family="paragraph">
      <style:paragraph-properties fo:break-before="page" fo:border="0.0034in solid #E5E7EB" fo:padding="0in" style:shadow="none" fo:margin-top="0in" fo:margin-bottom="0in" fo:background-color="#FFFFFF">
        <style:background-fill draw:fill="solid" draw:fill-color="#FFFFFF"/>
      </style:paragraph-properties>
    </style:style>
    <style:style style:name="T2" style:parent-style-name="DefaultParagraphFont" style:family="text">
      <style:text-properties style:font-name="Arial" style:font-name-asian="Times New Roman" style:font-name-complex="Arial" fo:font-weight="bold" style:font-weight-asian="bold" style:font-weight-complex="bold" fo:color="#09090B" style:letter-kerning="false" fo:font-size="18pt" style:font-size-asian="18pt" style:font-size-complex="18pt"/>
    </style:style>
    <style:style style:name="P3" style:parent-style-name="Normal" style:family="paragraph">
      <style:paragraph-properties style:line-height-at-least="0.1875in" fo:background-color="#FFFFFE">
        <style:background-fill draw:fill="solid" draw:fill-color="#FFFFFE"/>
      </style:paragraph-properties>
    </style:style>
    <style:style style:name="T4" style:parent-style-name="DefaultParagraphFont" style:family="text">
      <style:text-properties style:font-name="Consolas" style:font-name-asian="Times New Roman" style:font-name-complex="Times New Roman" fo:color="#0000FF" style:letter-kerning="false" fo:font-size="10pt" style:font-size-asian="10pt" style:font-size-complex="10pt"/>
    </style:style>
    <style:style style:name="T5"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6" style:parent-style-name="DefaultParagraphFont" style:family="text">
      <style:text-properties style:font-name="Consolas" style:font-name-asian="Times New Roman" style:font-name-complex="Times New Roman" fo:color="#008080" style:letter-kerning="false" fo:font-size="10pt" style:font-size-asian="10pt" style:font-size-complex="10pt"/>
    </style:style>
    <style:style style:name="T7"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8" style:parent-style-name="DefaultParagraphFont" style:family="text">
      <style:text-properties style:font-name="Consolas" style:font-name-asian="Times New Roman" style:font-name-complex="Times New Roman" fo:color="#0000FF" style:letter-kerning="false" fo:font-size="10pt" style:font-size-asian="10pt" style:font-size-complex="10pt"/>
    </style:style>
    <style:style style:name="T9"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10"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11"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12" style:parent-style-name="Normal" style:family="paragraph">
      <style:paragraph-properties fo:margin-bottom="0in" style:line-height-at-least="0.1875in" fo:background-color="#FFFFFE">
        <style:background-fill draw:fill="solid" draw:fill-color="#FFFFFE"/>
      </style:paragraph-properties>
    </style:style>
    <style:style style:name="T13" style:parent-style-name="DefaultParagraphFont" style:family="text">
      <style:text-properties style:font-name="Consolas" style:font-name-asian="Times New Roman" style:font-name-complex="Times New Roman" fo:color="#0000FF" style:letter-kerning="false" fo:font-size="10pt" style:font-size-asian="10pt" style:font-size-complex="10pt"/>
    </style:style>
    <style:style style:name="T14"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15" style:parent-style-name="DefaultParagraphFont" style:family="text">
      <style:text-properties style:font-name="Consolas" style:font-name-asian="Times New Roman" style:font-name-complex="Times New Roman" fo:color="#0000FF" style:letter-kerning="false" fo:font-size="10pt" style:font-size-asian="10pt" style:font-size-complex="10pt"/>
    </style:style>
    <style:style style:name="T16"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17"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18"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19" style:parent-style-name="Normal" style:family="paragraph">
      <style:paragraph-properties fo:margin-bottom="0in" style:line-height-at-least="0.1875in" fo:background-color="#FFFFFE">
        <style:background-fill draw:fill="solid" draw:fill-color="#FFFFFE"/>
      </style:paragraph-properties>
    </style:style>
    <style:style style:name="T20" style:parent-style-name="DefaultParagraphFont" style:family="text">
      <style:text-properties style:font-name="Consolas" style:font-name-asian="Times New Roman" style:font-name-complex="Times New Roman" fo:color="#0000FF" style:letter-kerning="false" fo:font-size="10pt" style:font-size-asian="10pt" style:font-size-complex="10pt"/>
    </style:style>
    <style:style style:name="T21"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22" style:parent-style-name="DefaultParagraphFont" style:family="text">
      <style:text-properties style:font-name="Consolas" style:font-name-asian="Times New Roman" style:font-name-complex="Times New Roman" fo:color="#008080" style:letter-kerning="false" fo:font-size="10pt" style:font-size-asian="10pt" style:font-size-complex="10pt"/>
    </style:style>
    <style:style style:name="T23"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24" style:parent-style-name="DefaultParagraphFont" style:family="text">
      <style:text-properties style:font-name="Consolas" style:font-name-asian="Times New Roman" style:font-name-complex="Times New Roman" fo:color="#008080" style:letter-kerning="false" fo:font-size="10pt" style:font-size-asian="10pt" style:font-size-complex="10pt"/>
    </style:style>
    <style:style style:name="T25"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26" style:parent-style-name="DefaultParagraphFont" style:family="text">
      <style:text-properties style:font-name="Consolas" style:font-name-asian="Times New Roman" style:font-name-complex="Times New Roman" fo:color="#008080" style:letter-kerning="false" fo:font-size="10pt" style:font-size-asian="10pt" style:font-size-complex="10pt"/>
    </style:style>
    <style:style style:name="T27"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28" style:parent-style-name="DefaultParagraphFont" style:family="text">
      <style:text-properties style:font-name="Consolas" style:font-name-asian="Times New Roman" style:font-name-complex="Times New Roman" fo:color="#0000FF" style:letter-kerning="false" fo:font-size="10pt" style:font-size-asian="10pt" style:font-size-complex="10pt"/>
    </style:style>
    <style:style style:name="T29"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30"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31"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32"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33" style:parent-style-name="Normal" style:family="paragraph">
      <style:paragraph-properties fo:margin-bottom="0in" style:line-height-at-least="0.1875in" fo:background-color="#FFFFFE">
        <style:background-fill draw:fill="solid" draw:fill-color="#FFFFFE"/>
      </style:paragraph-properties>
    </style:style>
    <style:style style:name="T34" style:parent-style-name="DefaultParagraphFont" style:family="text">
      <style:text-properties style:font-name="Consolas" style:font-name-asian="Times New Roman" style:font-name-complex="Times New Roman" fo:color="#0000FF" style:letter-kerning="false" fo:font-size="10pt" style:font-size-asian="10pt" style:font-size-complex="10pt"/>
    </style:style>
    <style:style style:name="T35"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36" style:parent-style-name="Normal" style:family="paragraph">
      <style:paragraph-properties fo:margin-bottom="0in" style:line-height-at-least="0.1875in" fo:background-color="#FFFFFE">
        <style:background-fill draw:fill="solid" draw:fill-color="#FFFFFE"/>
      </style:paragraph-properties>
    </style:style>
    <style:style style:name="T37"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38"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39"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40"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41"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42"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43"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44"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45"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46"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47"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48"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49"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50"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51"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52" style:parent-style-name="Normal" style:family="paragraph">
      <style:paragraph-properties fo:margin-bottom="0in" style:line-height-at-least="0.1875in" fo:background-color="#FFFFFE">
        <style:background-fill draw:fill="solid" draw:fill-color="#FFFFFE"/>
      </style:paragraph-properties>
    </style:style>
    <style:style style:name="T53"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54" style:parent-style-name="DefaultParagraphFont" style:family="text">
      <style:text-properties style:font-name="Consolas" style:font-name-asian="Times New Roman" style:font-name-complex="Times New Roman" fo:color="#000000" style:letter-kerning="false" fo:font-size="10pt" style:font-size-asian="10pt" style:font-size-complex="10pt" fo:language="pt" fo:country="PT"/>
    </style:style>
    <style:style style:name="T55" style:parent-style-name="DefaultParagraphFont" style:family="text">
      <style:text-properties style:font-name="Consolas" style:font-name-asian="Times New Roman" style:font-name-complex="Times New Roman" fo:color="#A31515" style:letter-kerning="false" fo:font-size="10pt" style:font-size-asian="10pt" style:font-size-complex="10pt" fo:language="pt" fo:country="PT"/>
    </style:style>
    <style:style style:name="T56" style:parent-style-name="DefaultParagraphFont" style:family="text">
      <style:text-properties style:font-name="Consolas" style:font-name-asian="Times New Roman" style:font-name-complex="Times New Roman" fo:color="#000000" style:letter-kerning="false" fo:font-size="10pt" style:font-size-asian="10pt" style:font-size-complex="10pt" fo:language="pt" fo:country="PT"/>
    </style:style>
    <style:style style:name="T57" style:parent-style-name="DefaultParagraphFont" style:family="text">
      <style:text-properties style:font-name="Consolas" style:font-name-asian="Times New Roman" style:font-name-complex="Times New Roman" fo:color="#A31515" style:letter-kerning="false" fo:font-size="10pt" style:font-size-asian="10pt" style:font-size-complex="10pt" fo:language="pt" fo:country="PT"/>
    </style:style>
    <style:style style:name="T58" style:parent-style-name="DefaultParagraphFont" style:family="text">
      <style:text-properties style:font-name="Consolas" style:font-name-asian="Times New Roman" style:font-name-complex="Times New Roman" fo:color="#000000" style:letter-kerning="false" fo:font-size="10pt" style:font-size-asian="10pt" style:font-size-complex="10pt" fo:language="pt" fo:country="PT"/>
    </style:style>
    <style:style style:name="T59" style:parent-style-name="DefaultParagraphFont" style:family="text">
      <style:text-properties style:font-name="Consolas" style:font-name-asian="Times New Roman" style:font-name-complex="Times New Roman" fo:color="#A31515" style:letter-kerning="false" fo:font-size="10pt" style:font-size-asian="10pt" style:font-size-complex="10pt" fo:language="pt" fo:country="PT"/>
    </style:style>
    <style:style style:name="T60" style:parent-style-name="DefaultParagraphFont" style:family="text">
      <style:text-properties style:font-name="Consolas" style:font-name-asian="Times New Roman" style:font-name-complex="Times New Roman" fo:color="#000000" style:letter-kerning="false" fo:font-size="10pt" style:font-size-asian="10pt" style:font-size-complex="10pt" fo:language="pt" fo:country="PT"/>
    </style:style>
    <style:style style:name="T61" style:parent-style-name="DefaultParagraphFont" style:family="text">
      <style:text-properties style:font-name="Consolas" style:font-name-asian="Times New Roman" style:font-name-complex="Times New Roman" fo:color="#A31515" style:letter-kerning="false" fo:font-size="10pt" style:font-size-asian="10pt" style:font-size-complex="10pt" fo:language="pt" fo:country="PT"/>
    </style:style>
    <style:style style:name="T62" style:parent-style-name="DefaultParagraphFont" style:family="text">
      <style:text-properties style:font-name="Consolas" style:font-name-asian="Times New Roman" style:font-name-complex="Times New Roman" fo:color="#000000" style:letter-kerning="false" fo:font-size="10pt" style:font-size-asian="10pt" style:font-size-complex="10pt" fo:language="pt" fo:country="PT"/>
    </style:style>
    <style:style style:name="T63" style:parent-style-name="DefaultParagraphFont" style:family="text">
      <style:text-properties style:font-name="Consolas" style:font-name-asian="Times New Roman" style:font-name-complex="Times New Roman" fo:color="#A31515" style:letter-kerning="false" fo:font-size="10pt" style:font-size-asian="10pt" style:font-size-complex="10pt" fo:language="pt" fo:country="PT"/>
    </style:style>
    <style:style style:name="T64" style:parent-style-name="DefaultParagraphFont" style:family="text">
      <style:text-properties style:font-name="Consolas" style:font-name-asian="Times New Roman" style:font-name-complex="Times New Roman" fo:color="#000000" style:letter-kerning="false" fo:font-size="10pt" style:font-size-asian="10pt" style:font-size-complex="10pt" fo:language="pt" fo:country="PT"/>
    </style:style>
    <style:style style:name="T65" style:parent-style-name="DefaultParagraphFont" style:family="text">
      <style:text-properties style:font-name="Consolas" style:font-name-asian="Times New Roman" style:font-name-complex="Times New Roman" fo:color="#A31515" style:letter-kerning="false" fo:font-size="10pt" style:font-size-asian="10pt" style:font-size-complex="10pt" fo:language="pt" fo:country="PT"/>
    </style:style>
    <style:style style:name="T66" style:parent-style-name="DefaultParagraphFont" style:family="text">
      <style:text-properties style:font-name="Consolas" style:font-name-asian="Times New Roman" style:font-name-complex="Times New Roman" fo:color="#000000" style:letter-kerning="false" fo:font-size="10pt" style:font-size-asian="10pt" style:font-size-complex="10pt" fo:language="pt" fo:country="PT"/>
    </style:style>
    <style:style style:name="T67" style:parent-style-name="DefaultParagraphFont" style:family="text">
      <style:text-properties style:font-name="Consolas" style:font-name-asian="Times New Roman" style:font-name-complex="Times New Roman" fo:color="#A31515" style:letter-kerning="false" fo:font-size="10pt" style:font-size-asian="10pt" style:font-size-complex="10pt" fo:language="pt" fo:country="PT"/>
    </style:style>
    <style:style style:name="T68" style:parent-style-name="DefaultParagraphFont" style:family="text">
      <style:text-properties style:font-name="Consolas" style:font-name-asian="Times New Roman" style:font-name-complex="Times New Roman" fo:color="#000000" style:letter-kerning="false" fo:font-size="10pt" style:font-size-asian="10pt" style:font-size-complex="10pt" fo:language="pt" fo:country="PT"/>
    </style:style>
    <style:style style:name="P69"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70"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71" style:parent-style-name="Normal" style:family="paragraph">
      <style:paragraph-properties fo:margin-bottom="0in" style:line-height-at-least="0.1875in" fo:background-color="#FFFFFE">
        <style:background-fill draw:fill="solid" draw:fill-color="#FFFFFE"/>
      </style:paragraph-properties>
    </style:style>
    <style:style style:name="T72" style:parent-style-name="DefaultParagraphFont" style:family="text">
      <style:text-properties style:font-name="Consolas" style:font-name-asian="Times New Roman" style:font-name-complex="Times New Roman" fo:color="#0000FF" style:letter-kerning="false" fo:font-size="10pt" style:font-size-asian="10pt" style:font-size-complex="10pt"/>
    </style:style>
    <style:style style:name="T73"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74"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75"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76"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77"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78"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79"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80"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81"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82"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83"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84"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85"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86"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87"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88"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89" style:parent-style-name="Normal" style:family="paragraph">
      <style:paragraph-properties fo:margin-bottom="0in" style:line-height-at-least="0.1875in" fo:background-color="#FFFFFE">
        <style:background-fill draw:fill="solid" draw:fill-color="#FFFFFE"/>
      </style:paragraph-properties>
    </style:style>
    <style:style style:name="T90" style:parent-style-name="DefaultParagraphFont" style:family="text">
      <style:text-properties style:font-name="Consolas" style:font-name-asian="Times New Roman" style:font-name-complex="Times New Roman" fo:color="#0000FF" style:letter-kerning="false" fo:font-size="10pt" style:font-size-asian="10pt" style:font-size-complex="10pt"/>
    </style:style>
    <style:style style:name="T91"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92" style:parent-style-name="DefaultParagraphFont" style:family="text">
      <style:text-properties style:font-name="Consolas" style:font-name-asian="Times New Roman" style:font-name-complex="Times New Roman" fo:color="#0000FF" style:letter-kerning="false" fo:font-size="10pt" style:font-size-asian="10pt" style:font-size-complex="10pt"/>
    </style:style>
    <style:style style:name="T93"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94" style:parent-style-name="DefaultParagraphFont" style:family="text">
      <style:text-properties style:font-name="Consolas" style:font-name-asian="Times New Roman" style:font-name-complex="Times New Roman" fo:color="#0000FF" style:letter-kerning="false" fo:font-size="10pt" style:font-size-asian="10pt" style:font-size-complex="10pt"/>
    </style:style>
    <style:style style:name="T95"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96" style:parent-style-name="DefaultParagraphFont" style:family="text">
      <style:text-properties style:font-name="Consolas" style:font-name-asian="Times New Roman" style:font-name-complex="Times New Roman" fo:color="#008080" style:letter-kerning="false" fo:font-size="10pt" style:font-size-asian="10pt" style:font-size-complex="10pt"/>
    </style:style>
    <style:style style:name="T97"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98" style:parent-style-name="Normal" style:family="paragraph">
      <style:paragraph-properties fo:margin-bottom="0in" style:line-height-at-least="0.1875in" fo:background-color="#FFFFFE">
        <style:background-fill draw:fill="solid" draw:fill-color="#FFFFFE"/>
      </style:paragraph-properties>
    </style:style>
    <style:style style:name="T99"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100" style:parent-style-name="DefaultParagraphFont" style:family="text">
      <style:text-properties style:font-name="Consolas" style:font-name-asian="Times New Roman" style:font-name-complex="Times New Roman" fo:color="#0000FF" style:letter-kerning="false" fo:font-size="10pt" style:font-size-asian="10pt" style:font-size-complex="10pt"/>
    </style:style>
    <style:style style:name="T101"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102" style:parent-style-name="Normal" style:family="paragraph">
      <style:paragraph-properties fo:margin-bottom="0in" style:line-height-at-least="0.1875in" fo:background-color="#FFFFFE">
        <style:background-fill draw:fill="solid" draw:fill-color="#FFFFFE"/>
      </style:paragraph-properties>
    </style:style>
    <style:style style:name="T103"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104" style:parent-style-name="DefaultParagraphFont" style:family="text">
      <style:text-properties style:font-name="Consolas" style:font-name-asian="Times New Roman" style:font-name-complex="Times New Roman" fo:color="#0000FF" style:letter-kerning="false" fo:font-size="10pt" style:font-size-asian="10pt" style:font-size-complex="10pt"/>
    </style:style>
    <style:style style:name="T105"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106" style:parent-style-name="DefaultParagraphFont" style:family="text">
      <style:text-properties style:font-name="Consolas" style:font-name-asian="Times New Roman" style:font-name-complex="Times New Roman" fo:color="#0000FF" style:letter-kerning="false" fo:font-size="10pt" style:font-size-asian="10pt" style:font-size-complex="10pt"/>
    </style:style>
    <style:style style:name="T107"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108" style:parent-style-name="Normal" style:family="paragraph">
      <style:paragraph-properties fo:margin-bottom="0in" style:line-height-at-least="0.1875in" fo:background-color="#FFFFFE">
        <style:background-fill draw:fill="solid" draw:fill-color="#FFFFFE"/>
      </style:paragraph-properties>
    </style:style>
    <style:style style:name="T109"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110" style:parent-style-name="DefaultParagraphFont" style:family="text">
      <style:text-properties style:font-name="Consolas" style:font-name-asian="Times New Roman" style:font-name-complex="Times New Roman" fo:color="#0000FF" style:letter-kerning="false" fo:font-size="10pt" style:font-size-asian="10pt" style:font-size-complex="10pt"/>
    </style:style>
    <style:style style:name="T111"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112" style:parent-style-name="DefaultParagraphFont" style:family="text">
      <style:text-properties style:font-name="Consolas" style:font-name-asian="Times New Roman" style:font-name-complex="Times New Roman" fo:color="#0000FF" style:letter-kerning="false" fo:font-size="10pt" style:font-size-asian="10pt" style:font-size-complex="10pt"/>
    </style:style>
    <style:style style:name="T113"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114"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115"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116" style:parent-style-name="Normal" style:family="paragraph">
      <style:paragraph-properties fo:margin-bottom="0in" style:line-height-at-least="0.1875in" fo:background-color="#FFFFFE">
        <style:background-fill draw:fill="solid" draw:fill-color="#FFFFFE"/>
      </style:paragraph-properties>
    </style:style>
    <style:style style:name="T117"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118" style:parent-style-name="DefaultParagraphFont" style:family="text">
      <style:text-properties style:font-name="Consolas" style:font-name-asian="Times New Roman" style:font-name-complex="Times New Roman" fo:color="#0000FF" style:letter-kerning="false" fo:font-size="10pt" style:font-size-asian="10pt" style:font-size-complex="10pt"/>
    </style:style>
    <style:style style:name="T119"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120" style:parent-style-name="DefaultParagraphFont" style:family="text">
      <style:text-properties style:font-name="Consolas" style:font-name-asian="Times New Roman" style:font-name-complex="Times New Roman" fo:color="#098658" style:letter-kerning="false" fo:font-size="10pt" style:font-size-asian="10pt" style:font-size-complex="10pt"/>
    </style:style>
    <style:style style:name="T121"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122" style:parent-style-name="Normal" style:family="paragraph">
      <style:paragraph-properties fo:margin-bottom="0in" style:line-height-at-least="0.1875in" fo:background-color="#FFFFFE">
        <style:background-fill draw:fill="solid" draw:fill-color="#FFFFFE"/>
      </style:paragraph-properties>
    </style:style>
    <style:style style:name="T123"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124"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125"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126" style:parent-style-name="Normal" style:family="paragraph">
      <style:paragraph-properties fo:margin-bottom="0in" style:line-height-at-least="0.1875in" fo:background-color="#FFFFFE">
        <style:background-fill draw:fill="solid" draw:fill-color="#FFFFFE"/>
      </style:paragraph-properties>
    </style:style>
    <style:style style:name="T127"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128" style:parent-style-name="DefaultParagraphFont" style:family="text">
      <style:text-properties style:font-name="Consolas" style:font-name-asian="Times New Roman" style:font-name-complex="Times New Roman" fo:color="#0000FF" style:letter-kerning="false" fo:font-size="10pt" style:font-size-asian="10pt" style:font-size-complex="10pt"/>
    </style:style>
    <style:style style:name="T129"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130"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131"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132"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133"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134" style:parent-style-name="Normal" style:family="paragraph">
      <style:paragraph-properties fo:margin-bottom="0in" style:line-height-at-least="0.1875in" fo:background-color="#FFFFFE">
        <style:background-fill draw:fill="solid" draw:fill-color="#FFFFFE"/>
      </style:paragraph-properties>
    </style:style>
    <style:style style:name="T135"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136" style:parent-style-name="DefaultParagraphFont" style:family="text">
      <style:text-properties style:font-name="Consolas" style:font-name-asian="Times New Roman" style:font-name-complex="Times New Roman" fo:color="#0000FF" style:letter-kerning="false" fo:font-size="10pt" style:font-size-asian="10pt" style:font-size-complex="10pt"/>
    </style:style>
    <style:style style:name="T137"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138" style:parent-style-name="Normal" style:family="paragraph">
      <style:paragraph-properties fo:margin-bottom="0in" style:line-height-at-least="0.1875in" fo:background-color="#FFFFFE">
        <style:background-fill draw:fill="solid" draw:fill-color="#FFFFFE"/>
      </style:paragraph-properties>
    </style:style>
    <style:style style:name="T139"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140"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141"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142" style:parent-style-name="Normal" style:family="paragraph">
      <style:paragraph-properties fo:margin-bottom="0in" style:line-height-at-least="0.1875in" fo:background-color="#FFFFFE">
        <style:background-fill draw:fill="solid" draw:fill-color="#FFFFFE"/>
      </style:paragraph-properties>
    </style:style>
    <style:style style:name="T143"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144" style:parent-style-name="DefaultParagraphFont" style:family="text">
      <style:text-properties style:font-name="Consolas" style:font-name-asian="Times New Roman" style:font-name-complex="Times New Roman" fo:color="#0000FF" style:letter-kerning="false" fo:font-size="10pt" style:font-size-asian="10pt" style:font-size-complex="10pt"/>
    </style:style>
    <style:style style:name="T145"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146"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147"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148" style:parent-style-name="Normal" style:family="paragraph">
      <style:paragraph-properties fo:margin-bottom="0in" style:line-height-at-least="0.1875in" fo:background-color="#FFFFFE">
        <style:background-fill draw:fill="solid" draw:fill-color="#FFFFFE"/>
      </style:paragraph-properties>
    </style:style>
    <style:style style:name="T149"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150" style:parent-style-name="DefaultParagraphFont" style:family="text">
      <style:text-properties style:font-name="Consolas" style:font-name-asian="Times New Roman" style:font-name-complex="Times New Roman" fo:color="#0000FF" style:letter-kerning="false" fo:font-size="10pt" style:font-size-asian="10pt" style:font-size-complex="10pt"/>
    </style:style>
    <style:style style:name="T151"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152" style:parent-style-name="Normal" style:family="paragraph">
      <style:paragraph-properties fo:margin-bottom="0in" style:line-height-at-least="0.1875in" fo:background-color="#FFFFFE">
        <style:background-fill draw:fill="solid" draw:fill-color="#FFFFFE"/>
      </style:paragraph-properties>
    </style:style>
    <style:style style:name="T153"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154"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P155" style:parent-style-name="Normal" style:family="paragraph">
      <style:paragraph-properties fo:margin-bottom="0in" style:line-height-at-least="0.1875in" fo:background-color="#FFFFFE">
        <style:background-fill draw:fill="solid" draw:fill-color="#FFFFFE"/>
      </style:paragraph-properties>
    </style:style>
    <style:style style:name="T156"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157"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158"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159"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160"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161" style:parent-style-name="Normal" style:family="paragraph">
      <style:paragraph-properties fo:margin-bottom="0in" style:line-height-at-least="0.1875in" fo:background-color="#FFFFFE">
        <style:background-fill draw:fill="solid" draw:fill-color="#FFFFFE"/>
      </style:paragraph-properties>
    </style:style>
    <style:style style:name="T162"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163"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164"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165" style:parent-style-name="Normal" style:family="paragraph">
      <style:paragraph-properties fo:margin-bottom="0in" style:line-height-at-least="0.1875in" fo:background-color="#FFFFFE">
        <style:background-fill draw:fill="solid" draw:fill-color="#FFFFFE"/>
      </style:paragraph-properties>
    </style:style>
    <style:style style:name="T166"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167"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168"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169" style:parent-style-name="Normal" style:family="paragraph">
      <style:paragraph-properties fo:margin-bottom="0in" style:line-height-at-least="0.1875in" fo:background-color="#FFFFFE">
        <style:background-fill draw:fill="solid" draw:fill-color="#FFFFFE"/>
      </style:paragraph-properties>
    </style:style>
    <style:style style:name="T170"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171" style:parent-style-name="DefaultParagraphFont" style:family="text">
      <style:text-properties style:font-name="Consolas" style:font-name-asian="Times New Roman" style:font-name-complex="Times New Roman" fo:color="#008000" style:letter-kerning="false" fo:font-size="10pt" style:font-size-asian="10pt" style:font-size-complex="10pt"/>
    </style:style>
    <style:style style:name="T172"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173" style:parent-style-name="Normal" style:family="paragraph">
      <style:paragraph-properties fo:margin-bottom="0in" style:line-height-at-least="0.1875in" fo:background-color="#FFFFFE">
        <style:background-fill draw:fill="solid" draw:fill-color="#FFFFFE"/>
      </style:paragraph-properties>
    </style:style>
    <style:style style:name="T174"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175"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176"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177" style:parent-style-name="DefaultParagraphFont" style:family="text">
      <style:text-properties style:font-name="Consolas" style:font-name-asian="Times New Roman" style:font-name-complex="Times New Roman" fo:color="#098658" style:letter-kerning="false" fo:font-size="10pt" style:font-size-asian="10pt" style:font-size-complex="10pt"/>
    </style:style>
    <style:style style:name="T178"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179"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180"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181"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182" style:parent-style-name="Normal" style:family="paragraph">
      <style:paragraph-properties fo:margin-bottom="0in" style:line-height-at-least="0.1875in" fo:background-color="#FFFFFE">
        <style:background-fill draw:fill="solid" draw:fill-color="#FFFFFE"/>
      </style:paragraph-properties>
    </style:style>
    <style:style style:name="T183"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184"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P185" style:parent-style-name="Normal" style:family="paragraph">
      <style:paragraph-properties fo:margin-bottom="0in" style:line-height-at-least="0.1875in" fo:background-color="#FFFFFE">
        <style:background-fill draw:fill="solid" draw:fill-color="#FFFFFE"/>
      </style:paragraph-properties>
    </style:style>
    <style:style style:name="T186"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187" style:parent-style-name="DefaultParagraphFont" style:family="text">
      <style:text-properties style:font-name="Consolas" style:font-name-asian="Times New Roman" style:font-name-complex="Times New Roman" fo:color="#000000" style:letter-kerning="false" fo:font-size="10pt" style:font-size-asian="10pt" style:font-size-complex="10pt" fo:language="pt" fo:country="PT"/>
    </style:style>
    <style:style style:name="T188" style:parent-style-name="DefaultParagraphFont" style:family="text">
      <style:text-properties style:font-name="Consolas" style:font-name-asian="Times New Roman" style:font-name-complex="Times New Roman" fo:color="#A31515" style:letter-kerning="false" fo:font-size="10pt" style:font-size-asian="10pt" style:font-size-complex="10pt" fo:language="pt" fo:country="PT"/>
    </style:style>
    <style:style style:name="P189" style:parent-style-name="Normal" style:family="paragraph">
      <style:paragraph-properties fo:margin-bottom="0in" style:line-height-at-least="0.1875in" fo:background-color="#FFFFFE">
        <style:background-fill draw:fill="solid" draw:fill-color="#FFFFFE"/>
      </style:paragraph-properties>
    </style:style>
    <style:style style:name="T190" style:parent-style-name="DefaultParagraphFont" style:family="text">
      <style:text-properties style:font-name="Consolas" style:font-name-asian="Times New Roman" style:font-name-complex="Times New Roman" fo:color="#000000" style:letter-kerning="false" fo:font-size="10pt" style:font-size-asian="10pt" style:font-size-complex="10pt" fo:language="pt" fo:country="PT"/>
    </style:style>
    <style:style style:name="T191"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192"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P193" style:parent-style-name="Normal" style:family="paragraph">
      <style:paragraph-properties fo:margin-bottom="0in" style:line-height-at-least="0.1875in" fo:background-color="#FFFFFE">
        <style:background-fill draw:fill="solid" draw:fill-color="#FFFFFE"/>
      </style:paragraph-properties>
    </style:style>
    <style:style style:name="T194"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195"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196"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197"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198"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199"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200"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201"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202" style:parent-style-name="Normal" style:family="paragraph">
      <style:paragraph-properties fo:margin-bottom="0in" style:line-height-at-least="0.1875in" fo:background-color="#FFFFFE">
        <style:background-fill draw:fill="solid" draw:fill-color="#FFFFFE"/>
      </style:paragraph-properties>
    </style:style>
    <style:style style:name="T203"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204" style:parent-style-name="DefaultParagraphFont" style:family="text">
      <style:text-properties style:font-name="Consolas" style:font-name-asian="Times New Roman" style:font-name-complex="Times New Roman" fo:color="#008000" style:letter-kerning="false" fo:font-size="10pt" style:font-size-asian="10pt" style:font-size-complex="10pt"/>
    </style:style>
    <style:style style:name="T205"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206" style:parent-style-name="Normal" style:family="paragraph">
      <style:paragraph-properties fo:margin-bottom="0in" style:line-height-at-least="0.1875in" fo:background-color="#FFFFFE">
        <style:background-fill draw:fill="solid" draw:fill-color="#FFFFFE"/>
      </style:paragraph-properties>
    </style:style>
    <style:style style:name="T207"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208"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209"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210"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211"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212"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213"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214" style:parent-style-name="Normal" style:family="paragraph">
      <style:paragraph-properties fo:margin-bottom="0in" style:line-height-at-least="0.1875in" fo:background-color="#FFFFFE">
        <style:background-fill draw:fill="solid" draw:fill-color="#FFFFFE"/>
      </style:paragraph-properties>
    </style:style>
    <style:style style:name="T215"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216"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P217" style:parent-style-name="Normal" style:family="paragraph">
      <style:paragraph-properties fo:margin-bottom="0in" style:line-height-at-least="0.1875in" fo:background-color="#FFFFFE">
        <style:background-fill draw:fill="solid" draw:fill-color="#FFFFFE"/>
      </style:paragraph-properties>
    </style:style>
    <style:style style:name="T218"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219"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220"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221"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222"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223"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224"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225"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226"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227" style:parent-style-name="Normal" style:family="paragraph">
      <style:paragraph-properties fo:margin-bottom="0in" style:line-height-at-least="0.1875in" fo:background-color="#FFFFFE">
        <style:background-fill draw:fill="solid" draw:fill-color="#FFFFFE"/>
      </style:paragraph-properties>
    </style:style>
    <style:style style:name="T228"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229" style:parent-style-name="DefaultParagraphFont" style:family="text">
      <style:text-properties style:font-name="Consolas" style:font-name-asian="Times New Roman" style:font-name-complex="Times New Roman" fo:color="#008000" style:letter-kerning="false" fo:font-size="10pt" style:font-size-asian="10pt" style:font-size-complex="10pt"/>
    </style:style>
    <style:style style:name="T230"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231" style:parent-style-name="Normal" style:family="paragraph">
      <style:paragraph-properties fo:margin-bottom="0in" style:line-height-at-least="0.1875in" fo:background-color="#FFFFFE">
        <style:background-fill draw:fill="solid" draw:fill-color="#FFFFFE"/>
      </style:paragraph-properties>
    </style:style>
    <style:style style:name="T232"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233"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234"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235"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236"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237" style:parent-style-name="Normal" style:family="paragraph">
      <style:paragraph-properties fo:margin-bottom="0in" style:line-height-at-least="0.1875in" fo:background-color="#FFFFFE">
        <style:background-fill draw:fill="solid" draw:fill-color="#FFFFFE"/>
      </style:paragraph-properties>
    </style:style>
    <style:style style:name="T238"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239"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P240" style:parent-style-name="Normal" style:family="paragraph">
      <style:paragraph-properties fo:margin-bottom="0in" style:line-height-at-least="0.1875in" fo:background-color="#FFFFFE">
        <style:background-fill draw:fill="solid" draw:fill-color="#FFFFFE"/>
      </style:paragraph-properties>
    </style:style>
    <style:style style:name="T241"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242" style:parent-style-name="DefaultParagraphFont" style:family="text">
      <style:text-properties style:font-name="Consolas" style:font-name-asian="Times New Roman" style:font-name-complex="Times New Roman" fo:color="#000000" style:letter-kerning="false" fo:font-size="10pt" style:font-size-asian="10pt" style:font-size-complex="10pt" fo:language="pt" fo:country="PT"/>
    </style:style>
    <style:style style:name="T243" style:parent-style-name="DefaultParagraphFont" style:family="text">
      <style:text-properties style:font-name="Consolas" style:font-name-asian="Times New Roman" style:font-name-complex="Times New Roman" fo:color="#A31515" style:letter-kerning="false" fo:font-size="10pt" style:font-size-asian="10pt" style:font-size-complex="10pt" fo:language="pt" fo:country="PT"/>
    </style:style>
    <style:style style:name="T244" style:parent-style-name="DefaultParagraphFont" style:family="text">
      <style:text-properties style:font-name="Consolas" style:font-name-asian="Times New Roman" style:font-name-complex="Times New Roman" fo:color="#000000" style:letter-kerning="false" fo:font-size="10pt" style:font-size-asian="10pt" style:font-size-complex="10pt" fo:language="pt" fo:country="PT"/>
    </style:style>
    <style:style style:name="T245" style:parent-style-name="DefaultParagraphFont" style:family="text">
      <style:text-properties style:font-name="Consolas" style:font-name-asian="Times New Roman" style:font-name-complex="Times New Roman" fo:color="#A31515" style:letter-kerning="false" fo:font-size="10pt" style:font-size-asian="10pt" style:font-size-complex="10pt" fo:language="pt" fo:country="PT"/>
    </style:style>
    <style:style style:name="T246" style:parent-style-name="DefaultParagraphFont" style:family="text">
      <style:text-properties style:font-name="Consolas" style:font-name-asian="Times New Roman" style:font-name-complex="Times New Roman" fo:color="#000000" style:letter-kerning="false" fo:font-size="10pt" style:font-size-asian="10pt" style:font-size-complex="10pt" fo:language="pt" fo:country="PT"/>
    </style:style>
    <style:style style:name="P247" style:parent-style-name="Normal" style:family="paragraph">
      <style:paragraph-properties fo:margin-bottom="0in" style:line-height-at-least="0.1875in" fo:background-color="#FFFFFE">
        <style:background-fill draw:fill="solid" draw:fill-color="#FFFFFE"/>
      </style:paragraph-properties>
    </style:style>
    <style:style style:name="T248" style:parent-style-name="DefaultParagraphFont" style:family="text">
      <style:text-properties style:font-name="Consolas" style:font-name-asian="Times New Roman" style:font-name-complex="Times New Roman" fo:color="#000000" style:letter-kerning="false" fo:font-size="10pt" style:font-size-asian="10pt" style:font-size-complex="10pt" fo:language="pt" fo:country="PT"/>
    </style:style>
    <style:style style:name="T249"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250" style:parent-style-name="Normal" style:family="paragraph">
      <style:paragraph-properties fo:margin-bottom="0in" style:line-height-at-least="0.1875in" fo:background-color="#FFFFFE">
        <style:background-fill draw:fill="solid" draw:fill-color="#FFFFFE"/>
      </style:paragraph-properties>
    </style:style>
    <style:style style:name="T251"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252" style:parent-style-name="DefaultParagraphFont" style:family="text">
      <style:text-properties style:font-name="Consolas" style:font-name-asian="Times New Roman" style:font-name-complex="Times New Roman" fo:color="#008080" style:letter-kerning="false" fo:font-size="10pt" style:font-size-asian="10pt" style:font-size-complex="10pt"/>
    </style:style>
    <style:style style:name="T253"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254"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255"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256" style:parent-style-name="Normal" style:family="paragraph">
      <style:paragraph-properties fo:margin-bottom="0in" style:line-height-at-least="0.1875in" fo:background-color="#FFFFFE">
        <style:background-fill draw:fill="solid" draw:fill-color="#FFFFFE"/>
      </style:paragraph-properties>
    </style:style>
    <style:style style:name="T257"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258"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259"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260"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261"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262"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263"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264"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265"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266"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267" style:parent-style-name="Normal" style:family="paragraph">
      <style:paragraph-properties fo:margin-bottom="0in" style:line-height-at-least="0.1875in" fo:background-color="#FFFFFE">
        <style:background-fill draw:fill="solid" draw:fill-color="#FFFFFE"/>
      </style:paragraph-properties>
    </style:style>
    <style:style style:name="T268"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269" style:parent-style-name="DefaultParagraphFont" style:family="text">
      <style:text-properties style:font-name="Consolas" style:font-name-asian="Times New Roman" style:font-name-complex="Times New Roman" fo:color="#008000" style:letter-kerning="false" fo:font-size="10pt" style:font-size-asian="10pt" style:font-size-complex="10pt"/>
    </style:style>
    <style:style style:name="T270"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271" style:parent-style-name="Normal" style:family="paragraph">
      <style:paragraph-properties fo:margin-bottom="0in" style:line-height-at-least="0.1875in" fo:background-color="#FFFFFE">
        <style:background-fill draw:fill="solid" draw:fill-color="#FFFFFE"/>
      </style:paragraph-properties>
    </style:style>
    <style:style style:name="T272"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273"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274"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275"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276"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277" style:parent-style-name="Normal" style:family="paragraph">
      <style:paragraph-properties fo:margin-bottom="0in" style:line-height-at-least="0.1875in" fo:background-color="#FFFFFE">
        <style:background-fill draw:fill="solid" draw:fill-color="#FFFFFE"/>
      </style:paragraph-properties>
    </style:style>
    <style:style style:name="T278"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279"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P280"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281" style:parent-style-name="Normal" style:family="paragraph">
      <style:paragraph-properties fo:margin-bottom="0in" style:line-height-at-least="0.1875in" fo:background-color="#FFFFFE">
        <style:background-fill draw:fill="solid" draw:fill-color="#FFFFFE"/>
      </style:paragraph-properties>
    </style:style>
    <style:style style:name="T282"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283" style:parent-style-name="DefaultParagraphFont" style:family="text">
      <style:text-properties style:font-name="Consolas" style:font-name-asian="Times New Roman" style:font-name-complex="Times New Roman" fo:color="#008080" style:letter-kerning="false" fo:font-size="10pt" style:font-size-asian="10pt" style:font-size-complex="10pt"/>
    </style:style>
    <style:style style:name="T284"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285"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286"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287" style:parent-style-name="Normal" style:family="paragraph">
      <style:paragraph-properties fo:margin-bottom="0in" style:line-height-at-least="0.1875in" fo:background-color="#FFFFFE">
        <style:background-fill draw:fill="solid" draw:fill-color="#FFFFFE"/>
      </style:paragraph-properties>
    </style:style>
    <style:style style:name="T288"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289"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290"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291"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292"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293"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294"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295"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296" style:parent-style-name="Normal" style:family="paragraph">
      <style:paragraph-properties fo:margin-bottom="0in" style:line-height-at-least="0.1875in" fo:background-color="#FFFFFE">
        <style:background-fill draw:fill="solid" draw:fill-color="#FFFFFE"/>
      </style:paragraph-properties>
    </style:style>
    <style:style style:name="T297"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298"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299"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300" style:parent-style-name="Normal" style:family="paragraph">
      <style:paragraph-properties fo:margin-bottom="0in" style:line-height-at-least="0.1875in" fo:background-color="#FFFFFE">
        <style:background-fill draw:fill="solid" draw:fill-color="#FFFFFE"/>
      </style:paragraph-properties>
    </style:style>
    <style:style style:name="T301"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302" style:parent-style-name="DefaultParagraphFont" style:family="text">
      <style:text-properties style:font-name="Consolas" style:font-name-asian="Times New Roman" style:font-name-complex="Times New Roman" fo:color="#008080" style:letter-kerning="false" fo:font-size="10pt" style:font-size-asian="10pt" style:font-size-complex="10pt"/>
    </style:style>
    <style:style style:name="T303"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304"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305"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306" style:parent-style-name="DefaultParagraphFont" style:family="text">
      <style:text-properties style:font-name="Consolas" style:font-name-asian="Times New Roman" style:font-name-complex="Times New Roman" fo:color="#008080" style:letter-kerning="false" fo:font-size="10pt" style:font-size-asian="10pt" style:font-size-complex="10pt"/>
    </style:style>
    <style:style style:name="T307"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308"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309"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310"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311"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312"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313"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314"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315" style:parent-style-name="Normal" style:family="paragraph">
      <style:paragraph-properties fo:margin-bottom="0in" style:line-height-at-least="0.1875in" fo:background-color="#FFFFFE">
        <style:background-fill draw:fill="solid" draw:fill-color="#FFFFFE"/>
      </style:paragraph-properties>
    </style:style>
    <style:style style:name="T316"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317" style:parent-style-name="DefaultParagraphFont" style:family="text">
      <style:text-properties style:font-name="Consolas" style:font-name-asian="Times New Roman" style:font-name-complex="Times New Roman" fo:color="#008000" style:letter-kerning="false" fo:font-size="10pt" style:font-size-asian="10pt" style:font-size-complex="10pt"/>
    </style:style>
    <style:style style:name="T318"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319"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320" style:parent-style-name="Normal" style:family="paragraph">
      <style:paragraph-properties fo:margin-bottom="0in" style:line-height-at-least="0.1875in" fo:background-color="#FFFFFE">
        <style:background-fill draw:fill="solid" draw:fill-color="#FFFFFE"/>
      </style:paragraph-properties>
    </style:style>
    <style:style style:name="T321"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322"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323"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324" style:parent-style-name="Normal" style:family="paragraph">
      <style:paragraph-properties fo:margin-bottom="0in" style:line-height-at-least="0.1875in" fo:background-color="#FFFFFE">
        <style:background-fill draw:fill="solid" draw:fill-color="#FFFFFE"/>
      </style:paragraph-properties>
    </style:style>
    <style:style style:name="T325"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326"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327"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328"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329"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330"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331"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332" style:parent-style-name="Normal" style:family="paragraph">
      <style:paragraph-properties fo:margin-bottom="0in" style:line-height-at-least="0.1875in" fo:background-color="#FFFFFE">
        <style:background-fill draw:fill="solid" draw:fill-color="#FFFFFE"/>
      </style:paragraph-properties>
    </style:style>
    <style:style style:name="T333"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334"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P335"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336"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337"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338"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339"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340"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341"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342"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343"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344"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T345" style:parent-style-name="DefaultParagraphFont" style:family="text">
      <style:text-properties fo:font-weight="bold" style:font-weight-asian="bold" style:font-weight-complex="bold"/>
    </style:style>
    <style:style style:name="T346" style:parent-style-name="DefaultParagraphFont" style:family="text">
      <style:text-properties fo:language="pt" fo:country="PT"/>
    </style:style>
    <style:style style:name="T347" style:parent-style-name="DefaultParagraphFont" style:family="text">
      <style:text-properties fo:language="pt" fo:country="PT"/>
    </style:style>
    <style:style style:name="P348" style:parent-style-name="Heading2" style:family="paragraph">
      <style:paragraph-properties fo:border="0.0034in solid #E5E7EB" fo:padding="0in" style:shadow="none" fo:margin-top="0in" fo:margin-bottom="0in" fo:background-color="#FFFFFF">
        <style:background-fill draw:fill="solid" draw:fill-color="#FFFFFF"/>
      </style:paragraph-properties>
    </style:style>
    <style:style style:name="T349" style:parent-style-name="DefaultParagraphFont" style:family="text">
      <style:text-properties style:font-name="Arial" style:font-name-asian="Times New Roman" style:font-name-complex="Arial" fo:font-weight="bold" style:font-weight-asian="bold" style:font-weight-complex="bold" fo:color="#09090B" style:letter-kerning="false" fo:font-size="18pt" style:font-size-asian="18pt" style:font-size-complex="18pt"/>
    </style:style>
    <style:style style:name="T350" style:parent-style-name="DefaultParagraphFont" style:family="text">
      <style:text-properties fo:language="pt" fo:country="PT"/>
    </style:style>
    <style:style style:name="P351" style:parent-style-name="Normal" style:family="paragraph">
      <style:text-properties fo:language="pt" fo:country="PT"/>
    </style:style>
    <style:style style:name="P352" style:parent-style-name="Normal" style:family="paragraph">
      <style:text-properties fo:language="pt" fo:country="PT"/>
    </style:style>
    <style:style style:name="P353" style:parent-style-name="Normal" style:family="paragraph">
      <style:text-properties fo:language="pt" fo:country="PT"/>
    </style:style>
    <style:style style:name="T354" style:parent-style-name="DefaultParagraphFont" style:family="text">
      <style:text-properties fo:language="pt" fo:country="PT"/>
    </style:style>
    <style:style style:name="P355" style:parent-style-name="Heading2" style:family="paragraph">
      <style:paragraph-properties fo:border="0.0034in solid #E5E7EB" fo:padding="0in" style:shadow="none" fo:margin-top="0in" fo:margin-bottom="0in" fo:background-color="#FFFFFF">
        <style:background-fill draw:fill="solid" draw:fill-color="#FFFFFF"/>
      </style:paragraph-properties>
    </style:style>
    <style:style style:name="T356" style:parent-style-name="DefaultParagraphFont" style:family="text">
      <style:text-properties style:font-name="Arial" style:font-name-asian="Times New Roman" style:font-name-complex="Arial" fo:font-weight="bold" style:font-weight-asian="bold" style:font-weight-complex="bold" fo:color="#09090B" style:letter-kerning="false" fo:font-size="18pt" style:font-size-asian="18pt" style:font-size-complex="18pt"/>
    </style:style>
    <style:style style:name="T357" style:parent-style-name="DefaultParagraphFont" style:family="text">
      <style:text-properties fo:language="pt" fo:country="PT"/>
    </style:style>
    <style:style style:name="P358" style:parent-style-name="Normal" style:family="paragraph">
      <style:text-properties fo:language="pt" fo:country="PT"/>
    </style:style>
    <style:style style:name="P359" style:parent-style-name="Normal" style:family="paragraph">
      <style:text-properties fo:language="pt" fo:country="PT"/>
    </style:style>
    <style:style style:name="P360" style:parent-style-name="Normal" style:family="paragraph">
      <style:text-properties fo:language="pt" fo:country="PT"/>
    </style:style>
    <style:style style:name="T361" style:parent-style-name="DefaultParagraphFont" style:family="text">
      <style:text-properties fo:language="pt" fo:country="PT"/>
    </style:style>
    <style:style style:name="P362" style:parent-style-name="Heading2" style:family="paragraph">
      <style:paragraph-properties fo:border="0.0034in solid #E5E7EB" fo:padding="0in" style:shadow="none" fo:margin-top="0in" fo:margin-bottom="0in" fo:background-color="#FFFFFF">
        <style:background-fill draw:fill="solid" draw:fill-color="#FFFFFF"/>
      </style:paragraph-properties>
    </style:style>
    <style:style style:name="T363" style:parent-style-name="DefaultParagraphFont" style:family="text">
      <style:text-properties style:font-name="Arial" style:font-name-asian="Times New Roman" style:font-name-complex="Arial" fo:font-weight="bold" style:font-weight-asian="bold" style:font-weight-complex="bold" fo:color="#09090B" style:letter-kerning="false" fo:font-size="18pt" style:font-size-asian="18pt" style:font-size-complex="18pt"/>
    </style:style>
    <style:style style:name="P364" style:parent-style-name="Normal" style:family="paragraph">
      <style:paragraph-properties fo:margin-bottom="0in" style:line-height-at-least="0.1875in" fo:background-color="#FFFFFE">
        <style:background-fill draw:fill="solid" draw:fill-color="#FFFFFE"/>
      </style:paragraph-properties>
    </style:style>
    <style:style style:name="T365" style:parent-style-name="DefaultParagraphFont" style:family="text">
      <style:text-properties style:font-name="Consolas" style:font-name-asian="Times New Roman" style:font-name-complex="Times New Roman" fo:color="#0000FF" style:letter-kerning="false" fo:font-size="10pt" style:font-size-asian="10pt" style:font-size-complex="10pt"/>
    </style:style>
    <style:style style:name="T366"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367" style:parent-style-name="DefaultParagraphFont" style:family="text">
      <style:text-properties style:font-name="Consolas" style:font-name-asian="Times New Roman" style:font-name-complex="Times New Roman" fo:color="#008080" style:letter-kerning="false" fo:font-size="10pt" style:font-size-asian="10pt" style:font-size-complex="10pt"/>
    </style:style>
    <style:style style:name="T368"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369" style:parent-style-name="DefaultParagraphFont" style:family="text">
      <style:text-properties style:font-name="Consolas" style:font-name-asian="Times New Roman" style:font-name-complex="Times New Roman" fo:color="#0000FF" style:letter-kerning="false" fo:font-size="10pt" style:font-size-asian="10pt" style:font-size-complex="10pt"/>
    </style:style>
    <style:style style:name="T370"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371"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372"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373" style:parent-style-name="Normal" style:family="paragraph">
      <style:paragraph-properties fo:margin-bottom="0in" style:line-height-at-least="0.1875in" fo:background-color="#FFFFFE">
        <style:background-fill draw:fill="solid" draw:fill-color="#FFFFFE"/>
      </style:paragraph-properties>
    </style:style>
    <style:style style:name="T374" style:parent-style-name="DefaultParagraphFont" style:family="text">
      <style:text-properties style:font-name="Consolas" style:font-name-asian="Times New Roman" style:font-name-complex="Times New Roman" fo:color="#0000FF" style:letter-kerning="false" fo:font-size="10pt" style:font-size-asian="10pt" style:font-size-complex="10pt"/>
    </style:style>
    <style:style style:name="T375"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376" style:parent-style-name="DefaultParagraphFont" style:family="text">
      <style:text-properties style:font-name="Consolas" style:font-name-asian="Times New Roman" style:font-name-complex="Times New Roman" fo:color="#0000FF" style:letter-kerning="false" fo:font-size="10pt" style:font-size-asian="10pt" style:font-size-complex="10pt"/>
    </style:style>
    <style:style style:name="T377"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378"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379"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380" style:parent-style-name="Normal" style:family="paragraph">
      <style:paragraph-properties fo:margin-bottom="0in" style:line-height-at-least="0.1875in" fo:background-color="#FFFFFE">
        <style:background-fill draw:fill="solid" draw:fill-color="#FFFFFE"/>
      </style:paragraph-properties>
    </style:style>
    <style:style style:name="T381" style:parent-style-name="DefaultParagraphFont" style:family="text">
      <style:text-properties style:font-name="Consolas" style:font-name-asian="Times New Roman" style:font-name-complex="Times New Roman" fo:color="#0000FF" style:letter-kerning="false" fo:font-size="10pt" style:font-size-asian="10pt" style:font-size-complex="10pt"/>
    </style:style>
    <style:style style:name="T382"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383" style:parent-style-name="DefaultParagraphFont" style:family="text">
      <style:text-properties style:font-name="Consolas" style:font-name-asian="Times New Roman" style:font-name-complex="Times New Roman" fo:color="#0000FF" style:letter-kerning="false" fo:font-size="10pt" style:font-size-asian="10pt" style:font-size-complex="10pt"/>
    </style:style>
    <style:style style:name="T384"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385"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386"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387" style:parent-style-name="Normal" style:family="paragraph">
      <style:paragraph-properties fo:margin-bottom="0in" style:line-height-at-least="0.1875in" fo:background-color="#FFFFFE">
        <style:background-fill draw:fill="solid" draw:fill-color="#FFFFFE"/>
      </style:paragraph-properties>
    </style:style>
    <style:style style:name="T388" style:parent-style-name="DefaultParagraphFont" style:family="text">
      <style:text-properties style:font-name="Consolas" style:font-name-asian="Times New Roman" style:font-name-complex="Times New Roman" fo:color="#0000FF" style:letter-kerning="false" fo:font-size="10pt" style:font-size-asian="10pt" style:font-size-complex="10pt"/>
    </style:style>
    <style:style style:name="T389"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390" style:parent-style-name="DefaultParagraphFont" style:family="text">
      <style:text-properties style:font-name="Consolas" style:font-name-asian="Times New Roman" style:font-name-complex="Times New Roman" fo:color="#008080" style:letter-kerning="false" fo:font-size="10pt" style:font-size-asian="10pt" style:font-size-complex="10pt"/>
    </style:style>
    <style:style style:name="T391"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392" style:parent-style-name="DefaultParagraphFont" style:family="text">
      <style:text-properties style:font-name="Consolas" style:font-name-asian="Times New Roman" style:font-name-complex="Times New Roman" fo:color="#0000FF" style:letter-kerning="false" fo:font-size="10pt" style:font-size-asian="10pt" style:font-size-complex="10pt"/>
    </style:style>
    <style:style style:name="T393"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394"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395"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396"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397" style:parent-style-name="Normal" style:family="paragraph">
      <style:paragraph-properties fo:margin-bottom="0in" style:line-height-at-least="0.1875in" fo:background-color="#FFFFFE">
        <style:background-fill draw:fill="solid" draw:fill-color="#FFFFFE"/>
      </style:paragraph-properties>
    </style:style>
    <style:style style:name="T398" style:parent-style-name="DefaultParagraphFont" style:family="text">
      <style:text-properties style:font-name="Consolas" style:font-name-asian="Times New Roman" style:font-name-complex="Times New Roman" fo:color="#0000FF" style:letter-kerning="false" fo:font-size="10pt" style:font-size-asian="10pt" style:font-size-complex="10pt"/>
    </style:style>
    <style:style style:name="T399"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400"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401" style:parent-style-name="Normal" style:family="paragraph">
      <style:paragraph-properties fo:margin-bottom="0in" style:line-height-at-least="0.1875in" fo:background-color="#FFFFFE">
        <style:background-fill draw:fill="solid" draw:fill-color="#FFFFFE"/>
      </style:paragraph-properties>
    </style:style>
    <style:style style:name="T402"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403"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404"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405" style:parent-style-name="Normal" style:family="paragraph">
      <style:paragraph-properties fo:margin-bottom="0in" style:line-height-at-least="0.1875in" fo:background-color="#FFFFFE">
        <style:background-fill draw:fill="solid" draw:fill-color="#FFFFFE"/>
      </style:paragraph-properties>
    </style:style>
    <style:style style:name="T406"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407"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408"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409" style:parent-style-name="Normal" style:family="paragraph">
      <style:paragraph-properties fo:margin-bottom="0in" style:line-height-at-least="0.1875in" fo:background-color="#FFFFFE">
        <style:background-fill draw:fill="solid" draw:fill-color="#FFFFFE"/>
      </style:paragraph-properties>
    </style:style>
    <style:style style:name="T410"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411" style:parent-style-name="DefaultParagraphFont" style:family="text">
      <style:text-properties style:font-name="Consolas" style:font-name-asian="Times New Roman" style:font-name-complex="Times New Roman" fo:color="#000000" style:letter-kerning="false" fo:font-size="10pt" style:font-size-asian="10pt" style:font-size-complex="10pt" fo:language="pt" fo:country="PT"/>
    </style:style>
    <style:style style:name="P412"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fo:language="pt" fo:country="PT"/>
    </style:style>
    <style:style style:name="P413" style:parent-style-name="Normal" style:family="paragraph">
      <style:paragraph-properties fo:margin-bottom="0in" style:line-height-at-least="0.1875in" fo:background-color="#FFFFFE">
        <style:background-fill draw:fill="solid" draw:fill-color="#FFFFFE"/>
      </style:paragraph-properties>
    </style:style>
    <style:style style:name="T414" style:parent-style-name="DefaultParagraphFont" style:family="text">
      <style:text-properties style:font-name="Consolas" style:font-name-asian="Times New Roman" style:font-name-complex="Times New Roman" fo:color="#000000" style:letter-kerning="false" fo:font-size="10pt" style:font-size-asian="10pt" style:font-size-complex="10pt" fo:language="pt" fo:country="PT"/>
    </style:style>
    <style:style style:name="T415" style:parent-style-name="DefaultParagraphFont" style:family="text">
      <style:text-properties style:font-name="Consolas" style:font-name-asian="Times New Roman" style:font-name-complex="Times New Roman" fo:color="#A31515" style:letter-kerning="false" fo:font-size="10pt" style:font-size-asian="10pt" style:font-size-complex="10pt" fo:language="pt" fo:country="PT"/>
    </style:style>
    <style:style style:name="T416" style:parent-style-name="DefaultParagraphFont" style:family="text">
      <style:text-properties style:font-name="Consolas" style:font-name-asian="Times New Roman" style:font-name-complex="Times New Roman" fo:color="#000000" style:letter-kerning="false" fo:font-size="10pt" style:font-size-asian="10pt" style:font-size-complex="10pt" fo:language="pt" fo:country="PT"/>
    </style:style>
    <style:style style:name="P417" style:parent-style-name="Normal" style:family="paragraph">
      <style:paragraph-properties fo:margin-bottom="0in" style:line-height-at-least="0.1875in" fo:background-color="#FFFFFE">
        <style:background-fill draw:fill="solid" draw:fill-color="#FFFFFE"/>
      </style:paragraph-properties>
    </style:style>
    <style:style style:name="T418" style:parent-style-name="DefaultParagraphFont" style:family="text">
      <style:text-properties style:font-name="Consolas" style:font-name-asian="Times New Roman" style:font-name-complex="Times New Roman" fo:color="#000000" style:letter-kerning="false" fo:font-size="10pt" style:font-size-asian="10pt" style:font-size-complex="10pt" fo:language="pt" fo:country="PT"/>
    </style:style>
    <style:style style:name="T419" style:parent-style-name="DefaultParagraphFont" style:family="text">
      <style:text-properties style:font-name="Consolas" style:font-name-asian="Times New Roman" style:font-name-complex="Times New Roman" fo:color="#A31515" style:letter-kerning="false" fo:font-size="10pt" style:font-size-asian="10pt" style:font-size-complex="10pt" fo:language="pt" fo:country="PT"/>
    </style:style>
    <style:style style:name="T420" style:parent-style-name="DefaultParagraphFont" style:family="text">
      <style:text-properties style:font-name="Consolas" style:font-name-asian="Times New Roman" style:font-name-complex="Times New Roman" fo:color="#000000" style:letter-kerning="false" fo:font-size="10pt" style:font-size-asian="10pt" style:font-size-complex="10pt" fo:language="pt" fo:country="PT"/>
    </style:style>
    <style:style style:name="P421" style:parent-style-name="Normal" style:family="paragraph">
      <style:paragraph-properties fo:margin-bottom="0in" style:line-height-at-least="0.1875in" fo:background-color="#FFFFFE">
        <style:background-fill draw:fill="solid" draw:fill-color="#FFFFFE"/>
      </style:paragraph-properties>
    </style:style>
    <style:style style:name="T422" style:parent-style-name="DefaultParagraphFont" style:family="text">
      <style:text-properties style:font-name="Consolas" style:font-name-asian="Times New Roman" style:font-name-complex="Times New Roman" fo:color="#000000" style:letter-kerning="false" fo:font-size="10pt" style:font-size-asian="10pt" style:font-size-complex="10pt" fo:language="pt" fo:country="PT"/>
    </style:style>
    <style:style style:name="T423"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424"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425"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426" style:parent-style-name="Normal" style:family="paragraph">
      <style:paragraph-properties fo:margin-bottom="0in" style:line-height-at-least="0.1875in" fo:background-color="#FFFFFE">
        <style:background-fill draw:fill="solid" draw:fill-color="#FFFFFE"/>
      </style:paragraph-properties>
    </style:style>
    <style:style style:name="T427" style:parent-style-name="DefaultParagraphFont" style:family="text">
      <style:text-properties style:font-name="Consolas" style:font-name-asian="Times New Roman" style:font-name-complex="Times New Roman" fo:color="#0000FF" style:letter-kerning="false" fo:font-size="10pt" style:font-size-asian="10pt" style:font-size-complex="10pt"/>
    </style:style>
    <style:style style:name="T428"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429" style:parent-style-name="DefaultParagraphFont" style:family="text">
      <style:text-properties style:font-name="Consolas" style:font-name-asian="Times New Roman" style:font-name-complex="Times New Roman" fo:color="#0000FF" style:letter-kerning="false" fo:font-size="10pt" style:font-size-asian="10pt" style:font-size-complex="10pt"/>
    </style:style>
    <style:style style:name="T430"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431" style:parent-style-name="DefaultParagraphFont" style:family="text">
      <style:text-properties style:font-name="Consolas" style:font-name-asian="Times New Roman" style:font-name-complex="Times New Roman" fo:color="#0000FF" style:letter-kerning="false" fo:font-size="10pt" style:font-size-asian="10pt" style:font-size-complex="10pt"/>
    </style:style>
    <style:style style:name="T432"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433" style:parent-style-name="DefaultParagraphFont" style:family="text">
      <style:text-properties style:font-name="Consolas" style:font-name-asian="Times New Roman" style:font-name-complex="Times New Roman" fo:color="#008080" style:letter-kerning="false" fo:font-size="10pt" style:font-size-asian="10pt" style:font-size-complex="10pt"/>
    </style:style>
    <style:style style:name="T434"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435" style:parent-style-name="Normal" style:family="paragraph">
      <style:paragraph-properties fo:margin-bottom="0in" style:line-height-at-least="0.1875in" fo:background-color="#FFFFFE">
        <style:background-fill draw:fill="solid" draw:fill-color="#FFFFFE"/>
      </style:paragraph-properties>
    </style:style>
    <style:style style:name="T436"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437" style:parent-style-name="DefaultParagraphFont" style:family="text">
      <style:text-properties style:font-name="Consolas" style:font-name-asian="Times New Roman" style:font-name-complex="Times New Roman" fo:color="#0000FF" style:letter-kerning="false" fo:font-size="10pt" style:font-size-asian="10pt" style:font-size-complex="10pt"/>
    </style:style>
    <style:style style:name="T438"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439" style:parent-style-name="Normal" style:family="paragraph">
      <style:paragraph-properties fo:margin-bottom="0in" style:line-height-at-least="0.1875in" fo:background-color="#FFFFFE">
        <style:background-fill draw:fill="solid" draw:fill-color="#FFFFFE"/>
      </style:paragraph-properties>
    </style:style>
    <style:style style:name="T440"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441" style:parent-style-name="DefaultParagraphFont" style:family="text">
      <style:text-properties style:font-name="Consolas" style:font-name-asian="Times New Roman" style:font-name-complex="Times New Roman" fo:color="#0000FF" style:letter-kerning="false" fo:font-size="10pt" style:font-size-asian="10pt" style:font-size-complex="10pt"/>
    </style:style>
    <style:style style:name="T442"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443"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444" style:parent-style-name="Normal" style:family="paragraph">
      <style:paragraph-properties fo:margin-bottom="0in" style:line-height-at-least="0.1875in" fo:background-color="#FFFFFE">
        <style:background-fill draw:fill="solid" draw:fill-color="#FFFFFE"/>
      </style:paragraph-properties>
    </style:style>
    <style:style style:name="T445"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446" style:parent-style-name="DefaultParagraphFont" style:family="text">
      <style:text-properties style:font-name="Consolas" style:font-name-asian="Times New Roman" style:font-name-complex="Times New Roman" fo:color="#0000FF" style:letter-kerning="false" fo:font-size="10pt" style:font-size-asian="10pt" style:font-size-complex="10pt"/>
    </style:style>
    <style:style style:name="T447"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448" style:parent-style-name="Normal" style:family="paragraph">
      <style:paragraph-properties fo:margin-bottom="0in" style:line-height-at-least="0.1875in" fo:background-color="#FFFFFE">
        <style:background-fill draw:fill="solid" draw:fill-color="#FFFFFE"/>
      </style:paragraph-properties>
    </style:style>
    <style:style style:name="T449"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450"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451"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452"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453"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454" style:parent-style-name="Normal" style:family="paragraph">
      <style:paragraph-properties fo:margin-bottom="0in" style:line-height-at-least="0.1875in" fo:background-color="#FFFFFE">
        <style:background-fill draw:fill="solid" draw:fill-color="#FFFFFE"/>
      </style:paragraph-properties>
    </style:style>
    <style:style style:name="T455"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456"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457"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458" style:parent-style-name="Normal" style:family="paragraph">
      <style:paragraph-properties fo:margin-bottom="0in" style:line-height-at-least="0.1875in" fo:background-color="#FFFFFE">
        <style:background-fill draw:fill="solid" draw:fill-color="#FFFFFE"/>
      </style:paragraph-properties>
    </style:style>
    <style:style style:name="T459"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460"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461"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462"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463" style:parent-style-name="Normal" style:family="paragraph">
      <style:paragraph-properties fo:margin-bottom="0in" style:line-height-at-least="0.1875in" fo:background-color="#FFFFFE">
        <style:background-fill draw:fill="solid" draw:fill-color="#FFFFFE"/>
      </style:paragraph-properties>
    </style:style>
    <style:style style:name="T464"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465" style:parent-style-name="DefaultParagraphFont" style:family="text">
      <style:text-properties style:font-name="Consolas" style:font-name-asian="Times New Roman" style:font-name-complex="Times New Roman" fo:color="#098658" style:letter-kerning="false" fo:font-size="10pt" style:font-size-asian="10pt" style:font-size-complex="10pt"/>
    </style:style>
    <style:style style:name="T466"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467" style:parent-style-name="DefaultParagraphFont" style:family="text">
      <style:text-properties style:font-name="Consolas" style:font-name-asian="Times New Roman" style:font-name-complex="Times New Roman" fo:color="#098658" style:letter-kerning="false" fo:font-size="10pt" style:font-size-asian="10pt" style:font-size-complex="10pt"/>
    </style:style>
    <style:style style:name="T468"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469" style:parent-style-name="Normal" style:family="paragraph">
      <style:paragraph-properties fo:margin-bottom="0in" style:line-height-at-least="0.1875in" fo:background-color="#FFFFFE">
        <style:background-fill draw:fill="solid" draw:fill-color="#FFFFFE"/>
      </style:paragraph-properties>
    </style:style>
    <style:style style:name="T470"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471" style:parent-style-name="DefaultParagraphFont" style:family="text">
      <style:text-properties style:font-name="Consolas" style:font-name-asian="Times New Roman" style:font-name-complex="Times New Roman" fo:color="#098658" style:letter-kerning="false" fo:font-size="10pt" style:font-size-asian="10pt" style:font-size-complex="10pt"/>
    </style:style>
    <style:style style:name="T472"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473" style:parent-style-name="DefaultParagraphFont" style:family="text">
      <style:text-properties style:font-name="Consolas" style:font-name-asian="Times New Roman" style:font-name-complex="Times New Roman" fo:color="#098658" style:letter-kerning="false" fo:font-size="10pt" style:font-size-asian="10pt" style:font-size-complex="10pt"/>
    </style:style>
    <style:style style:name="T474"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475" style:parent-style-name="Normal" style:family="paragraph">
      <style:paragraph-properties fo:margin-bottom="0in" style:line-height-at-least="0.1875in" fo:background-color="#FFFFFE">
        <style:background-fill draw:fill="solid" draw:fill-color="#FFFFFE"/>
      </style:paragraph-properties>
    </style:style>
    <style:style style:name="T476"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477" style:parent-style-name="DefaultParagraphFont" style:family="text">
      <style:text-properties style:font-name="Consolas" style:font-name-asian="Times New Roman" style:font-name-complex="Times New Roman" fo:color="#0000FF" style:letter-kerning="false" fo:font-size="10pt" style:font-size-asian="10pt" style:font-size-complex="10pt"/>
    </style:style>
    <style:style style:name="T478"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479"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480"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481" style:parent-style-name="Normal" style:family="paragraph">
      <style:paragraph-properties fo:margin-bottom="0in" style:line-height-at-least="0.1875in" fo:background-color="#FFFFFE">
        <style:background-fill draw:fill="solid" draw:fill-color="#FFFFFE"/>
      </style:paragraph-properties>
    </style:style>
    <style:style style:name="T482"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483" style:parent-style-name="DefaultParagraphFont" style:family="text">
      <style:text-properties style:font-name="Consolas" style:font-name-asian="Times New Roman" style:font-name-complex="Times New Roman" fo:color="#098658" style:letter-kerning="false" fo:font-size="10pt" style:font-size-asian="10pt" style:font-size-complex="10pt"/>
    </style:style>
    <style:style style:name="T484"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485"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486"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487" style:parent-style-name="Normal" style:family="paragraph">
      <style:paragraph-properties fo:margin-bottom="0in" style:line-height-at-least="0.1875in" fo:background-color="#FFFFFE">
        <style:background-fill draw:fill="solid" draw:fill-color="#FFFFFE"/>
      </style:paragraph-properties>
    </style:style>
    <style:style style:name="T488"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489"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P490" style:parent-style-name="Normal" style:family="paragraph">
      <style:paragraph-properties fo:margin-bottom="0in" style:line-height-at-least="0.1875in" fo:background-color="#FFFFFE">
        <style:background-fill draw:fill="solid" draw:fill-color="#FFFFFE"/>
      </style:paragraph-properties>
    </style:style>
    <style:style style:name="T491"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492"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P493" style:parent-style-name="Normal" style:family="paragraph">
      <style:paragraph-properties fo:margin-bottom="0in" style:line-height-at-least="0.1875in" fo:background-color="#FFFFFE">
        <style:background-fill draw:fill="solid" draw:fill-color="#FFFFFE"/>
      </style:paragraph-properties>
    </style:style>
    <style:style style:name="T494"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495"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P496"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497"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498"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499"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500" style:parent-style-name="Normal" style:family="paragraph">
      <style:paragraph-properties fo:margin-bottom="0in" style:line-height-at-least="0.1875in" fo:background-color="#FFFFFE">
        <style:background-fill draw:fill="solid" draw:fill-color="#FFFFFE"/>
      </style:paragraph-properties>
    </style:style>
    <style:style style:name="T501"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502" style:parent-style-name="DefaultParagraphFont" style:family="text">
      <style:text-properties style:font-name="Consolas" style:font-name-asian="Times New Roman" style:font-name-complex="Times New Roman" fo:color="#098658" style:letter-kerning="false" fo:font-size="10pt" style:font-size-asian="10pt" style:font-size-complex="10pt"/>
    </style:style>
    <style:style style:name="T503"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504" style:parent-style-name="DefaultParagraphFont" style:family="text">
      <style:text-properties style:font-name="Consolas" style:font-name-asian="Times New Roman" style:font-name-complex="Times New Roman" fo:color="#098658" style:letter-kerning="false" fo:font-size="10pt" style:font-size-asian="10pt" style:font-size-complex="10pt"/>
    </style:style>
    <style:style style:name="T505"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506" style:parent-style-name="Normal" style:family="paragraph">
      <style:paragraph-properties fo:margin-bottom="0in" style:line-height-at-least="0.1875in" fo:background-color="#FFFFFE">
        <style:background-fill draw:fill="solid" draw:fill-color="#FFFFFE"/>
      </style:paragraph-properties>
    </style:style>
    <style:style style:name="T507"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508" style:parent-style-name="DefaultParagraphFont" style:family="text">
      <style:text-properties style:font-name="Consolas" style:font-name-asian="Times New Roman" style:font-name-complex="Times New Roman" fo:color="#098658" style:letter-kerning="false" fo:font-size="10pt" style:font-size-asian="10pt" style:font-size-complex="10pt"/>
    </style:style>
    <style:style style:name="T509"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510" style:parent-style-name="DefaultParagraphFont" style:family="text">
      <style:text-properties style:font-name="Consolas" style:font-name-asian="Times New Roman" style:font-name-complex="Times New Roman" fo:color="#098658" style:letter-kerning="false" fo:font-size="10pt" style:font-size-asian="10pt" style:font-size-complex="10pt"/>
    </style:style>
    <style:style style:name="T511"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512" style:parent-style-name="Normal" style:family="paragraph">
      <style:paragraph-properties fo:margin-bottom="0in" style:line-height-at-least="0.1875in" fo:background-color="#FFFFFE">
        <style:background-fill draw:fill="solid" draw:fill-color="#FFFFFE"/>
      </style:paragraph-properties>
    </style:style>
    <style:style style:name="T513"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514" style:parent-style-name="DefaultParagraphFont" style:family="text">
      <style:text-properties style:font-name="Consolas" style:font-name-asian="Times New Roman" style:font-name-complex="Times New Roman" fo:color="#0000FF" style:letter-kerning="false" fo:font-size="10pt" style:font-size-asian="10pt" style:font-size-complex="10pt"/>
    </style:style>
    <style:style style:name="T515"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516"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517"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518" style:parent-style-name="Normal" style:family="paragraph">
      <style:paragraph-properties fo:margin-bottom="0in" style:line-height-at-least="0.1875in" fo:background-color="#FFFFFE">
        <style:background-fill draw:fill="solid" draw:fill-color="#FFFFFE"/>
      </style:paragraph-properties>
    </style:style>
    <style:style style:name="T519"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520" style:parent-style-name="DefaultParagraphFont" style:family="text">
      <style:text-properties style:font-name="Consolas" style:font-name-asian="Times New Roman" style:font-name-complex="Times New Roman" fo:color="#098658" style:letter-kerning="false" fo:font-size="10pt" style:font-size-asian="10pt" style:font-size-complex="10pt"/>
    </style:style>
    <style:style style:name="T521"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522" style:parent-style-name="DefaultParagraphFont" style:family="text">
      <style:text-properties style:font-name="Consolas" style:font-name-asian="Times New Roman" style:font-name-complex="Times New Roman" fo:color="#098658" style:letter-kerning="false" fo:font-size="10pt" style:font-size-asian="10pt" style:font-size-complex="10pt"/>
    </style:style>
    <style:style style:name="T523"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524"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525" style:parent-style-name="Normal" style:family="paragraph">
      <style:paragraph-properties fo:margin-bottom="0in" style:line-height-at-least="0.1875in" fo:background-color="#FFFFFE">
        <style:background-fill draw:fill="solid" draw:fill-color="#FFFFFE"/>
      </style:paragraph-properties>
    </style:style>
    <style:style style:name="T526"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527"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528"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529" style:parent-style-name="Normal" style:family="paragraph">
      <style:paragraph-properties fo:margin-bottom="0in" style:line-height-at-least="0.1875in" fo:background-color="#FFFFFE">
        <style:background-fill draw:fill="solid" draw:fill-color="#FFFFFE"/>
      </style:paragraph-properties>
    </style:style>
    <style:style style:name="T530"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531" style:parent-style-name="DefaultParagraphFont" style:family="text">
      <style:text-properties style:font-name="Consolas" style:font-name-asian="Times New Roman" style:font-name-complex="Times New Roman" fo:color="#008080" style:letter-kerning="false" fo:font-size="10pt" style:font-size-asian="10pt" style:font-size-complex="10pt"/>
    </style:style>
    <style:style style:name="T532"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533"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534"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535"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536" style:parent-style-name="Normal" style:family="paragraph">
      <style:paragraph-properties fo:margin-bottom="0in" style:line-height-at-least="0.1875in" fo:background-color="#FFFFFE">
        <style:background-fill draw:fill="solid" draw:fill-color="#FFFFFE"/>
      </style:paragraph-properties>
    </style:style>
    <style:style style:name="T537"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538"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539"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540"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541"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542" style:parent-style-name="Normal" style:family="paragraph">
      <style:paragraph-properties fo:margin-bottom="0in" style:line-height-at-least="0.1875in" fo:background-color="#FFFFFE">
        <style:background-fill draw:fill="solid" draw:fill-color="#FFFFFE"/>
      </style:paragraph-properties>
    </style:style>
    <style:style style:name="T543"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544"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545"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546" style:parent-style-name="Normal" style:family="paragraph">
      <style:paragraph-properties fo:margin-bottom="0in" style:line-height-at-least="0.1875in" fo:background-color="#FFFFFE">
        <style:background-fill draw:fill="solid" draw:fill-color="#FFFFFE"/>
      </style:paragraph-properties>
    </style:style>
    <style:style style:name="T547"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T548" style:parent-style-name="DefaultParagraphFont" style:family="text">
      <style:text-properties style:font-name="Consolas" style:font-name-asian="Times New Roman" style:font-name-complex="Times New Roman" fo:color="#A31515" style:letter-kerning="false" fo:font-size="10pt" style:font-size-asian="10pt" style:font-size-complex="10pt"/>
    </style:style>
    <style:style style:name="T549" style:parent-style-name="DefaultParagraphFont" style:family="text">
      <style:text-properties style:font-name="Consolas" style:font-name-asian="Times New Roman" style:font-name-complex="Times New Roman" fo:color="#000000" style:letter-kerning="false" fo:font-size="10pt" style:font-size-asian="10pt" style:font-size-complex="10pt"/>
    </style:style>
    <style:style style:name="P550"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551"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552"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553"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554"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555"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556"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P557" style:parent-style-name="Normal" style:family="paragraph">
      <style:paragraph-properties fo:margin-bottom="0in" style:line-height-at-least="0.1875in" fo:background-color="#FFFFFE">
        <style:background-fill draw:fill="solid" draw:fill-color="#FFFFFE"/>
      </style:paragraph-properties>
      <style:text-properties style:font-name="Consolas" style:font-name-asian="Times New Roman" style:font-name-complex="Times New Roman" fo:color="#000000" style:letter-kerning="false" fo:font-size="10pt" style:font-size-asian="10pt" style:font-size-complex="10pt"/>
    </style:style>
    <style:style style:name="T558" style:parent-style-name="DefaultParagraphFont" style:family="text">
      <style:text-properties fo:font-weight="bold" style:font-weight-asian="bold" style:font-weight-complex="bold"/>
    </style:style>
    <style:style style:name="T559" style:parent-style-name="DefaultParagraphFont" style:family="text">
      <style:text-properties fo:language="pt" fo:country="PT"/>
    </style:style>
    <style:style style:name="P560" style:parent-style-name="Normal" style:family="paragraph">
      <style:text-properties fo:language="pt" fo:country="PT"/>
    </style:style>
    <style:style style:name="P561" style:parent-style-name="Normal" style:family="paragraph">
      <style:text-properties fo:language="pt" fo:country="PT"/>
    </style:style>
    <style:style style:name="P562" style:parent-style-name="Normal" style:family="paragraph">
      <style:text-properties fo:language="pt" fo:country="PT"/>
    </style:style>
    <style:style style:name="P563" style:parent-style-name="Normal" style:family="paragraph">
      <style:text-properties fo:language="pt" fo:country="PT"/>
    </style:style>
    <style:style style:name="P564" style:parent-style-name="Normal" style:family="paragraph">
      <style:text-properties fo:language="pt" fo:country="PT"/>
    </style:style>
    <style:style style:name="P565" style:parent-style-name="Normal" style:family="paragraph">
      <style:text-properties fo:language="pt" fo:country="PT"/>
    </style:style>
    <style:style style:name="P566" style:parent-style-name="Normal" style:family="paragraph">
      <style:text-properties fo:language="pt" fo:country="PT"/>
    </style:style>
    <style:style style:name="P567" style:parent-style-name="Normal" style:family="paragraph">
      <style:text-properties fo:language="pt" fo:country="PT"/>
    </style:style>
    <style:style style:name="P568" style:parent-style-name="Normal" style:family="paragraph">
      <style:text-properties fo:language="pt" fo:country="PT"/>
    </style:style>
    <style:style style:name="P569" style:parent-style-name="Normal" style:family="paragraph">
      <style:text-properties fo:language="pt" fo:country="PT"/>
    </style:style>
    <style:style style:name="P570" style:parent-style-name="Normal" style:family="paragraph">
      <style:text-properties fo:language="pt" fo:country="PT"/>
    </style:style>
    <style:style style:name="P571" style:parent-style-name="Normal" style:family="paragraph">
      <style:text-properties fo:language="pt" fo:country="PT"/>
    </style:style>
    <style:style style:name="P572" style:parent-style-name="Normal" style:family="paragraph">
      <style:text-properties fo:language="pt" fo:country="PT"/>
    </style:style>
    <style:style style:name="P573" style:parent-style-name="Normal" style:family="paragraph">
      <style:text-properties fo:language="pt" fo:country="PT"/>
    </style:style>
    <style:style style:name="P574" style:parent-style-name="Normal" style:family="paragraph">
      <style:text-properties fo:language="pt" fo:country="PT"/>
    </style:style>
    <style:style style:name="P575" style:parent-style-name="Normal" style:family="paragraph">
      <style:text-properties fo:language="pt" fo:country="PT"/>
    </style:style>
    <style:style style:name="P576" style:parent-style-name="Normal" style:family="paragraph">
      <style:text-properties fo:language="pt" fo:country="PT"/>
    </style:style>
    <style:style style:name="P577" style:parent-style-name="Normal" style:family="paragraph">
      <style:text-properties fo:language="pt" fo:country="PT"/>
    </style:style>
    <style:style style:name="P578" style:parent-style-name="Normal" style:family="paragraph">
      <style:text-properties fo:language="pt" fo:country="PT"/>
    </style:style>
    <style:style style:name="P579" style:parent-style-name="Normal" style:family="paragraph">
      <style:text-properties fo:language="pt" fo:country="PT"/>
    </style:style>
    <style:style style:name="P580" style:parent-style-name="Normal" style:family="paragraph">
      <style:text-properties fo:language="pt" fo:country="PT"/>
    </style:style>
    <style:style style:name="P581" style:parent-style-name="Normal" style:family="paragraph">
      <style:text-properties fo:language="pt" fo:country="PT"/>
    </style:style>
    <style:style style:name="P582" style:parent-style-name="Normal" style:family="paragraph">
      <style:text-properties fo:language="pt" fo:country="PT"/>
    </style:style>
    <style:style style:name="P583" style:parent-style-name="Normal" style:family="paragraph">
      <style:text-properties fo:language="pt" fo:country="PT"/>
    </style:style>
    <style:style style:name="P584" style:parent-style-name="Normal" style:family="paragraph">
      <style:text-properties fo:language="pt" fo:country="PT"/>
    </style:style>
    <style:style style:name="P585" style:parent-style-name="Normal" style:family="paragraph">
      <style:text-properties fo:language="pt" fo:country="PT"/>
    </style:style>
    <style:style style:name="P586" style:parent-style-name="Normal" style:family="paragraph">
      <style:text-properties fo:language="pt" fo:country="PT"/>
    </style:style>
    <style:style style:name="P587" style:parent-style-name="Normal" style:family="paragraph">
      <style:text-properties fo:language="pt" fo:country="PT"/>
    </style:style>
    <style:style style:name="P588" style:parent-style-name="Normal" style:family="paragraph">
      <style:text-properties fo:language="pt" fo:country="PT"/>
    </style:style>
    <style:style style:name="P589" style:parent-style-name="Normal" style:family="paragraph">
      <style:text-properties fo:language="pt" fo:country="PT"/>
    </style:style>
    <style:style style:name="P590" style:parent-style-name="Normal" style:family="paragraph">
      <style:text-properties fo:language="pt" fo:country="PT"/>
    </style:style>
    <style:style style:name="P591" style:parent-style-name="Normal" style:family="paragraph">
      <style:text-properties fo:language="pt" fo:country="PT"/>
    </style:style>
    <style:style style:name="T592" style:parent-style-name="DefaultParagraphFont" style:family="text">
      <style:text-properties fo:language="pt" fo:country="PT"/>
    </style:style>
    <style:style style:name="T593" style:parent-style-name="DefaultParagraphFont" style:family="text">
      <style:text-properties fo:font-weight="bold" style:font-weight-asian="bold" style:font-weight-complex="bold"/>
    </style:style>
    <style:style style:name="T594" style:parent-style-name="DefaultParagraphFont" style:family="text">
      <style:text-properties fo:language="pt" fo:country="PT"/>
    </style:style>
    <style:style style:name="P595" style:parent-style-name="Normal" style:family="paragraph">
      <style:text-properties fo:language="pt" fo:country="PT"/>
    </style:style>
    <style:style style:name="P596" style:parent-style-name="Normal" style:family="paragraph">
      <style:text-properties fo:language="pt" fo:country="PT"/>
    </style:style>
    <style:style style:name="P597" style:parent-style-name="Normal" style:family="paragraph">
      <style:text-properties fo:language="pt" fo:country="PT"/>
    </style:style>
    <style:style style:name="P598" style:parent-style-name="Normal" style:family="paragraph">
      <style:text-properties fo:language="pt" fo:country="PT"/>
    </style:style>
    <style:style style:name="P599" style:parent-style-name="Normal" style:family="paragraph">
      <style:text-properties fo:language="pt" fo:country="PT"/>
    </style:style>
    <style:style style:name="P600" style:parent-style-name="Normal" style:family="paragraph">
      <style:text-properties fo:language="pt" fo:country="PT"/>
    </style:style>
    <style:style style:name="P601" style:parent-style-name="Normal" style:family="paragraph">
      <style:text-properties fo:language="pt" fo:country="PT"/>
    </style:style>
    <style:style style:name="P602" style:parent-style-name="Normal" style:family="paragraph">
      <style:text-properties fo:language="pt" fo:country="PT"/>
    </style:style>
    <style:style style:name="P603" style:parent-style-name="Normal" style:family="paragraph">
      <style:text-properties fo:language="pt" fo:country="PT"/>
    </style:style>
    <style:style style:name="T604" style:parent-style-name="DefaultParagraphFont" style:family="text">
      <style:text-properties fo:language="pt" fo:country="PT"/>
    </style:style>
    <style:style style:name="T605" style:parent-style-name="DefaultParagraphFont" style:family="text">
      <style:text-properties style:font-name="Arial" style:font-name-complex="Arial" fo:font-weight="bold" style:font-weight-asian="bold" style:font-weight-complex="bold" fo:color="#09090B" fo:font-size="13.5pt" style:font-size-asian="13.5pt" style:font-size-complex="13.5pt" fo:background-color="#FFFFFF"/>
    </style:style>
    <style:style style:name="T606" style:parent-style-name="DefaultParagraphFont" style:family="text">
      <style:text-properties fo:language="pt" fo:country="PT"/>
    </style:style>
    <style:style style:name="P607" style:parent-style-name="Normal" style:family="paragraph">
      <style:text-properties fo:language="pt" fo:country="PT"/>
    </style:style>
    <style:style style:name="P608" style:parent-style-name="Normal" style:family="paragraph">
      <style:text-properties fo:language="pt" fo:country="PT"/>
    </style:style>
    <style:style style:name="P609" style:parent-style-name="Normal" style:family="paragraph">
      <style:text-properties fo:language="pt" fo:country="PT"/>
    </style:style>
    <style:style style:name="P610" style:parent-style-name="Normal" style:family="paragraph">
      <style:text-properties fo:language="pt" fo:country="PT"/>
    </style:style>
    <style:style style:name="P611" style:parent-style-name="Normal" style:family="paragraph">
      <style:text-properties fo:language="pt" fo:country="PT"/>
    </style:style>
    <style:style style:name="T612" style:parent-style-name="DefaultParagraphFont" style:family="text">
      <style:text-properties fo:language="pt" fo:country="PT"/>
    </style:style>
    <style:style style:name="T613" style:parent-style-name="DefaultParagraphFont" style:family="text">
      <style:text-properties fo:language="pt" fo:country="PT"/>
    </style:style>
    <style:style style:name="T614" style:parent-style-name="DefaultParagraphFont" style:family="text">
      <style:text-properties fo:language="pt" fo:country="PT"/>
    </style:style>
    <style:style style:name="T615" style:parent-style-name="DefaultParagraphFont" style:family="text">
      <style:text-properties fo:language="pt" fo:country="PT"/>
    </style:style>
    <style:style style:name="T616" style:parent-style-name="DefaultParagraphFont" style:family="text">
      <style:text-properties fo:language="pt" fo:country="PT"/>
    </style:style>
    <style:style style:name="T617" style:parent-style-name="DefaultParagraphFont" style:family="text">
      <style:text-properties fo:font-weight="bold" style:font-weight-asian="bold" style:font-weight-complex="bold"/>
    </style:style>
    <style:style style:name="T618" style:parent-style-name="DefaultParagraphFont" style:family="text">
      <style:text-properties fo:language="pt" fo:country="PT"/>
    </style:style>
    <style:style style:name="P619" style:parent-style-name="Normal" style:family="paragraph">
      <style:text-properties fo:language="pt" fo:country="PT"/>
    </style:style>
    <style:style style:name="P620" style:parent-style-name="Normal" style:family="paragraph">
      <style:text-properties fo:language="pt" fo:country="PT"/>
    </style:style>
    <style:style style:name="P621" style:parent-style-name="Normal" style:family="paragraph">
      <style:text-properties fo:language="pt" fo:country="PT"/>
    </style:style>
    <style:style style:name="P622" style:parent-style-name="Normal" style:family="paragraph">
      <style:text-properties fo:language="pt" fo:country="PT"/>
    </style:style>
    <style:style style:name="P623" style:parent-style-name="Normal" style:family="paragraph">
      <style:text-properties fo:language="pt" fo:country="PT"/>
    </style:style>
    <style:style style:name="P624" style:parent-style-name="Normal" style:family="paragraph">
      <style:text-properties fo:language="pt" fo:country="PT"/>
    </style:style>
    <style:style style:name="P625" style:parent-style-name="Normal" style:family="paragraph">
      <style:text-properties fo:language="pt" fo:country="PT"/>
    </style:style>
    <style:style style:name="P626" style:parent-style-name="Normal" style:family="paragraph">
      <style:text-properties fo:language="pt" fo:country="PT"/>
    </style:style>
    <style:style style:name="P627" style:parent-style-name="Normal" style:family="paragraph">
      <style:text-properties fo:language="pt" fo:country="PT"/>
    </style:style>
    <style:style style:name="P628" style:parent-style-name="Normal" style:family="paragraph">
      <style:text-properties fo:language="pt" fo:country="PT"/>
    </style:style>
    <style:style style:name="P629" style:parent-style-name="Normal" style:family="paragraph">
      <style:text-properties fo:language="pt" fo:country="PT"/>
    </style:style>
    <style:style style:name="T630" style:parent-style-name="DefaultParagraphFont" style:family="text">
      <style:text-properties fo:language="pt" fo:country="PT"/>
    </style:style>
    <style:style style:name="P631" style:parent-style-name="Heading2" style:family="paragraph">
      <style:paragraph-properties fo:border="0.0034in solid #E5E7EB" fo:padding="0in" style:shadow="none" fo:margin-top="0in" fo:margin-bottom="0in" fo:background-color="#FFFFFF">
        <style:background-fill draw:fill="solid" draw:fill-color="#FFFFFF"/>
      </style:paragraph-properties>
    </style:style>
    <style:style style:name="P632" style:parent-style-name="Heading2" style:family="paragraph">
      <style:paragraph-properties fo:border="0.0034in solid #E5E7EB" fo:padding="0in" style:shadow="none" fo:margin-top="0in" fo:margin-bottom="0in" fo:background-color="#FFFFFF">
        <style:background-fill draw:fill="solid" draw:fill-color="#FFFFFF"/>
      </style:paragraph-properties>
    </style:style>
    <style:style style:name="P633" style:parent-style-name="Heading2" style:family="paragraph">
      <style:paragraph-properties fo:border="0.0034in solid #E5E7EB" fo:padding="0in" style:shadow="none" fo:margin-top="0in" fo:margin-bottom="0in" fo:background-color="#FFFFFF">
        <style:background-fill draw:fill="solid" draw:fill-color="#FFFFFF"/>
      </style:paragraph-properties>
      <style:text-properties style:font-name="Arial" style:font-name-asian="Times New Roman" style:font-name-complex="Arial" fo:font-weight="bold" style:font-weight-asian="bold" style:font-weight-complex="bold" fo:color="#09090B" style:letter-kerning="false" fo:font-size="18pt" style:font-size-asian="18pt" style:font-size-complex="18pt"/>
    </style:style>
    <style:style style:name="T634" style:parent-style-name="DefaultParagraphFont" style:family="text">
      <style:text-properties fo:language="pt" fo:country="PT"/>
    </style:style>
    <style:style style:name="T635" style:parent-style-name="DefaultParagraphFont" style:family="text">
      <style:text-properties fo:language="pt" fo:country="PT"/>
    </style:style>
    <style:style style:name="T636" style:parent-style-name="DefaultParagraphFont" style:family="text">
      <style:text-properties fo:font-weight="bold" style:font-weight-asian="bold" style:font-weight-complex="bold" fo:color="#EE0000" fo:font-size="18pt" style:font-size-asian="18pt" style:font-size-complex="18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h text:style-name="P1" text:outline-level="2"><draw:frame draw:style-name="a0" draw:name="Picture 1" text:anchor-type="as-char" svg:x="0in" svg:y="0in" svg:width="6.5in" svg:height="4.32778in" style:rel-width="scale" style:rel-height="scale"><draw:image xlink:href="media/image1.png" xlink:type="simple" xlink:show="embed" xlink:actuate="onLoad"/><svg:title/><svg:desc/></draw:frame><text:line-break/>!-----------------------------------------------------------------------------------------!<text:line-break/><draw:frame draw:style-name="a1" draw:name="Picture 1" text:anchor-type="as-char" svg:x="0in" svg:y="0in" svg:width="6.5in" svg:height="3.22361in" style:rel-width="scale" style:rel-height="scale"><draw:image xlink:href="media/image2.png" xlink:type="simple" xlink:show="embed" xlink:actuate="onLoad"/><svg:title/><svg:desc/></draw:frame><text:line-break/>!--------------------------------------------------------------------------------------------!<text:line-break/><text:line-break/><text:span text:style-name="T2">Code Editor - src/components/mcc/Navbar.jsx</text:span></text:h>
      <text:soft-page-break/>
      <text:p text:style-name="P3"><text:line-break/><text:span text:style-name="T4">import</text:span><text:span text:style-name="T5"><text:s/></text:span><text:span text:style-name="T6">React</text:span><text:span text:style-name="T7">, { useState, useEffect }<text:s/></text:span><text:span text:style-name="T8">from</text:span><text:span text:style-name="T9"><text:s/></text:span><text:span text:style-name="T10">'react'</text:span><text:span text:style-name="T11">;</text:span></text:p>
      <text:p text:style-name="P12"><text:span text:style-name="T13">import</text:span><text:span text:style-name="T14"><text:s/>{ useLang }<text:s/></text:span><text:span text:style-name="T15">from</text:span><text:span text:style-name="T16"><text:s/></text:span><text:span text:style-name="T17">'./LanguageContext'</text:span><text:span text:style-name="T18">;</text:span></text:p>
      <text:p text:style-name="P19"><text:span text:style-name="T20">import</text:span><text:span text:style-name="T21"><text:s/>{<text:s/></text:span><text:span text:style-name="T22">Menu</text:span><text:span text:style-name="T23">,<text:s/></text:span><text:span text:style-name="T24">X</text:span><text:span text:style-name="T25">,<text:s/></text:span><text:span text:style-name="T26">Globe</text:span><text:span text:style-name="T27"><text:s/>}<text:s/></text:span><text:span text:style-name="T28">from</text:span><text:span text:style-name="T29"><text:s/></text:span><text:span text:style-name="T30">'lucide-react'</text:span><text:span text:style-name="T31">;</text:span></text:p>
      <text:p text:style-name="P32"/>
      <text:p text:style-name="P33"><text:span text:style-name="T34">const</text:span><text:span text:style-name="T35"><text:s/>navItems = {</text:span></text:p>
      <text:p text:style-name="P36"><text:span text:style-name="T37">  en: [</text:span><text:span text:style-name="T38">'Who We Are'</text:span><text:span text:style-name="T39">,<text:s/></text:span><text:span text:style-name="T40">'Mission'</text:span><text:span text:style-name="T41">,<text:s/></text:span><text:span text:style-name="T42">'Vision'</text:span><text:span text:style-name="T43">,<text:s/></text:span><text:span text:style-name="T44">'What We Do'</text:span><text:span text:style-name="T45">,<text:s/></text:span><text:span text:style-name="T46">'Donate'</text:span><text:span text:style-name="T47">,<text:s/></text:span><text:span text:style-name="T48">'Media'</text:span><text:span text:style-name="T49">,<text:s/></text:span><text:span text:style-name="T50">'Get Involved'</text:span><text:span text:style-name="T51">],</text:span></text:p>
      <text:p text:style-name="P52"><text:span text:style-name="T53"> <text:s/></text:span><text:span text:style-name="T54">pt: [</text:span><text:span text:style-name="T55">'Quem Somos'</text:span><text:span text:style-name="T56">,<text:s/></text:span><text:span text:style-name="T57">'Missão'</text:span><text:span text:style-name="T58">,<text:s/></text:span><text:span text:style-name="T59">'Visão'</text:span><text:span text:style-name="T60">,<text:s/></text:span><text:span text:style-name="T61">'O Que Fazemos'</text:span><text:span text:style-name="T62">,<text:s/></text:span><text:span text:style-name="T63">'Contribua'</text:span><text:span text:style-name="T64">,<text:s/></text:span><text:span text:style-name="T65">'Redes Sociais'</text:span><text:span text:style-name="T66">,<text:s/></text:span><text:span text:style-name="T67">'Como Participar'</text:span><text:span text:style-name="T68">],</text:span></text:p>
      <text:p text:style-name="P69">};</text:p>
      <text:p text:style-name="P70"/>
      <text:p text:style-name="P71"><text:span text:style-name="T72">const</text:span><text:span text:style-name="T73"><text:s/>sectionIds = [</text:span><text:span text:style-name="T74">'who-we-are'</text:span><text:span text:style-name="T75">,<text:s/></text:span><text:span text:style-name="T76">'mission'</text:span><text:span text:style-name="T77">,<text:s/></text:span><text:span text:style-name="T78">'vision'</text:span><text:span text:style-name="T79">,<text:s/></text:span><text:span text:style-name="T80">'what-we-do'</text:span><text:span text:style-name="T81">,<text:s/></text:span><text:span text:style-name="T82">'donate'</text:span><text:span text:style-name="T83">,<text:s/></text:span><text:span text:style-name="T84">'media'</text:span><text:span text:style-name="T85">,<text:s/></text:span><text:span text:style-name="T86">'get-involved'</text:span><text:span text:style-name="T87">];</text:span></text:p>
      <text:p text:style-name="P88"/>
      <text:p text:style-name="P89"><text:span text:style-name="T90">export</text:span><text:span text:style-name="T91"><text:s/></text:span><text:span text:style-name="T92">default</text:span><text:span text:style-name="T93"><text:s/></text:span><text:span text:style-name="T94">function</text:span><text:span text:style-name="T95"><text:s/></text:span><text:span text:style-name="T96">Navbar</text:span><text:span text:style-name="T97">() {</text:span></text:p>
      <text:p text:style-name="P98"><text:span text:style-name="T99"> <text:s/></text:span><text:span text:style-name="T100">const</text:span><text:span text:style-name="T101"><text:s/>{ lang, toggle } = useLang();</text:span></text:p>
      <text:p text:style-name="P102"><text:span text:style-name="T103"> <text:s/></text:span><text:span text:style-name="T104">const</text:span><text:span text:style-name="T105"><text:s/>[scrolled, setScrolled] = useState(</text:span><text:span text:style-name="T106">false</text:span><text:span text:style-name="T107">);</text:span></text:p>
      <text:p text:style-name="P108"><text:span text:style-name="T109"> <text:s/></text:span><text:span text:style-name="T110">const</text:span><text:span text:style-name="T111"><text:s/>[mobileOpen, setMobileOpen] = useState(</text:span><text:span text:style-name="T112">false</text:span><text:span text:style-name="T113">);</text:span></text:p>
      <text:p text:style-name="P114"/>
      <text:p text:style-name="P115">  useEffect(() =&gt; {</text:p>
      <text:p text:style-name="P116"><text:span text:style-name="T117">   <text:s/></text:span><text:span text:style-name="T118">const</text:span><text:span text:style-name="T119"><text:s/>onScroll = () =&gt; setScrolled(window.scrollY &gt;<text:s/></text:span><text:span text:style-name="T120">40</text:span><text:span text:style-name="T121">);</text:span></text:p>
      <text:p text:style-name="P122"><text:span text:style-name="T123">    window.addEventListener(</text:span><text:span text:style-name="T124">'scroll'</text:span><text:span text:style-name="T125">, onScroll);</text:span></text:p>
      <text:p text:style-name="P126"><text:span text:style-name="T127">   <text:s/></text:span><text:span text:style-name="T128">return</text:span><text:span text:style-name="T129"><text:s/>() =&gt; window.removeEventListener(</text:span><text:span text:style-name="T130">'scroll'</text:span><text:span text:style-name="T131">, onScroll);</text:span></text:p>
      <text:p text:style-name="P132">  }, []);</text:p>
      <text:p text:style-name="P133"/>
      <text:p text:style-name="P134"><text:span text:style-name="T135"> <text:s/></text:span><text:span text:style-name="T136">const</text:span><text:span text:style-name="T137"><text:s/>scrollTo = (id) =&gt; {</text:span></text:p>
      <text:p text:style-name="P138"><text:span text:style-name="T139">    document.getElementById(id)?.scrollIntoView({ behavior:<text:s/></text:span><text:span text:style-name="T140">'smooth'</text:span><text:span text:style-name="T141"><text:s/>});</text:span></text:p>
      <text:p text:style-name="P142"><text:span text:style-name="T143">    setMobileOpen(</text:span><text:span text:style-name="T144">false</text:span><text:span text:style-name="T145">);</text:span></text:p>
      <text:p text:style-name="P146">  };</text:p>
      <text:p text:style-name="P147"/>
      <text:p text:style-name="P148"><text:span text:style-name="T149"> <text:s/></text:span><text:span text:style-name="T150">return</text:span><text:span text:style-name="T151"><text:s/>(</text:span></text:p>
      <text:p text:style-name="P152"><text:span text:style-name="T153">    &lt;nav className=</text:span><text:span text:style-name="T154">"fixed top-0 left-0 right-0 z-50 transition-all duration-500"</text:span></text:p>
      <text:p text:style-name="P155"><text:span text:style-name="T156">      style={{ background:<text:s/></text:span><text:span text:style-name="T157">'#D4A843'</text:span><text:span text:style-name="T158">, boxShadow:<text:s/></text:span><text:span text:style-name="T159">'0 1px 8px rgba(0,0,0,0.15)'</text:span><text:span text:style-name="T160"><text:s/>}}&gt;</text:span></text:p>
      <text:p text:style-name="P161"><text:span text:style-name="T162">      &lt;div className=</text:span><text:span text:style-name="T163">"max-w-7xl mx-auto px-4 sm:px-6 lg:px-8"</text:span><text:span text:style-name="T164">&gt;</text:span></text:p>
      <text:p text:style-name="P165"><text:span text:style-name="T166">        &lt;div className=</text:span><text:span text:style-name="T167">"flex items-center justify-between h-16 lg:h-20"</text:span><text:span text:style-name="T168">&gt;</text:span></text:p>
      <text:p text:style-name="P169"><text:span text:style-name="T170">          {</text:span><text:span text:style-name="T171">/* Logo */</text:span><text:span text:style-name="T172">}</text:span></text:p>
      <text:p text:style-name="P173"><text:span text:style-name="T174">          &lt;div className=</text:span><text:span text:style-name="T175">"flex-shrink-0 cursor-pointer flex items-center gap-2"</text:span><text:span text:style-name="T176"><text:s/>onClick={() =&gt; window.scrollTo({ top:<text:s/></text:span><text:span text:style-name="T177">0</text:span><text:span text:style-name="T178">, behavior:<text:s/></text:span><text:span text:style-name="T179">'smooth'</text:span><text:span text:style-name="T180"><text:s/>})}&gt;</text:span></text:p>
      <text:p text:style-name="P181">            &lt;img</text:p>
      <text:p text:style-name="P182"><text:span text:style-name="T183">              src=</text:span><text:span text:style-name="T184">"https://media.base44.com/images/public/69a93b29a4a5a09a87751ceb/cef442afb_image.png"</text:span></text:p>
      <text:p text:style-name="P185"><text:span text:style-name="T186">             <text:s/></text:span><text:span text:style-name="T187">alt=</text:span><text:span text:style-name="T188">"Malalane Cultural Center Logo"</text:span></text:p>
      <text:p text:style-name="P189"><text:span text:style-name="T190">             <text:s/></text:span><text:span text:style-name="T191">className=</text:span><text:span text:style-name="T192">"h-12 lg:h-16 w-auto object-contain"</text:span></text:p>
      <text:p text:style-name="P193"><text:span text:style-name="T194">              style={{ mixBlendMode:<text:s/></text:span><text:span text:style-name="T195">'multiply'</text:span><text:span text:style-name="T196">, filter:<text:s/></text:span><text:span text:style-name="T197">'brightness(0.75) contrast(1.8) saturate(1.6)'</text:span><text:span text:style-name="T198"><text:s/>}}</text:span></text:p>
      <text:p text:style-name="P199">            /&gt;</text:p>
      <text:soft-page-break/>
      <text:p text:style-name="P200">          &lt;/div&gt;</text:p>
      <text:p text:style-name="P201"/>
      <text:p text:style-name="P202"><text:span text:style-name="T203">          {</text:span><text:span text:style-name="T204">/* Desktop Nav */</text:span><text:span text:style-name="T205">}</text:span></text:p>
      <text:p text:style-name="P206"><text:span text:style-name="T207">          &lt;div className=</text:span><text:span text:style-name="T208">"hidden lg:flex flex-1 items-center justify-evenly mx-8"</text:span><text:span text:style-name="T209">&gt;</text:span></text:p>
      <text:p text:style-name="P210">            {navItems[lang].map((item, i) =&gt; (</text:p>
      <text:p text:style-name="P211">              &lt;button</text:p>
      <text:p text:style-name="P212">                key={sectionIds[i]}</text:p>
      <text:p text:style-name="P213">                onClick={() =&gt; scrollTo(sectionIds[i])}</text:p>
      <text:p text:style-name="P214"><text:span text:style-name="T215">                className=</text:span><text:span text:style-name="T216">"px-2 py-2 text-xs font-medium tracking-wide uppercase transition-colors duration-300 rounded-md hover:bg-white/10 whitespace-nowrap"</text:span></text:p>
      <text:p text:style-name="P217"><text:span text:style-name="T218">                style={{ color:<text:s/></text:span><text:span text:style-name="T219">'#1A1A2E'</text:span><text:span text:style-name="T220"><text:s/>}}</text:span></text:p>
      <text:p text:style-name="P221">              &gt;</text:p>
      <text:p text:style-name="P222">                {item}</text:p>
      <text:p text:style-name="P223">              &lt;/button&gt;</text:p>
      <text:p text:style-name="P224">            ))}</text:p>
      <text:p text:style-name="P225">          &lt;/div&gt;</text:p>
      <text:p text:style-name="P226"/>
      <text:p text:style-name="P227"><text:span text:style-name="T228">          {</text:span><text:span text:style-name="T229">/* Language toggle - desktop */</text:span><text:span text:style-name="T230">}</text:span></text:p>
      <text:p text:style-name="P231"><text:span text:style-name="T232">          &lt;div className=</text:span><text:span text:style-name="T233">"hidden lg:flex items-center"</text:span><text:span text:style-name="T234">&gt;</text:span></text:p>
      <text:p text:style-name="P235">            &lt;button</text:p>
      <text:p text:style-name="P236">              onClick={toggle}</text:p>
      <text:p text:style-name="P237"><text:span text:style-name="T238">              className=</text:span><text:span text:style-name="T239">"flex items-center gap-1.5 px-3 py-1.5 rounded-full border transition-all duration-300 text-xs font-semibold"</text:span></text:p>
      <text:p text:style-name="P240"><text:span text:style-name="T241">             <text:s/></text:span><text:span text:style-name="T242">style={{ color:<text:s/></text:span><text:span text:style-name="T243">'#1A1A2E'</text:span><text:span text:style-name="T244">, borderColor:<text:s/></text:span><text:span text:style-name="T245">'#1A1A2E66'</text:span><text:span text:style-name="T246"><text:s/>}}</text:span></text:p>
      <text:p text:style-name="P247"><text:span text:style-name="T248">           <text:s/></text:span><text:span text:style-name="T249">&gt;</text:span></text:p>
      <text:p text:style-name="P250"><text:span text:style-name="T251">              &lt;</text:span><text:span text:style-name="T252">Globe</text:span><text:span text:style-name="T253"><text:s/>className=</text:span><text:span text:style-name="T254">"w-3.5 h-3.5"</text:span><text:span text:style-name="T255"><text:s/>/&gt;</text:span></text:p>
      <text:p text:style-name="P256"><text:span text:style-name="T257">              {lang ===<text:s/></text:span><text:span text:style-name="T258">'en'</text:span><text:span text:style-name="T259"><text:s/>?<text:s/></text:span><text:span text:style-name="T260">'PT'</text:span><text:span text:style-name="T261"><text:s/>:<text:s/></text:span><text:span text:style-name="T262">'EN'</text:span><text:span text:style-name="T263">}</text:span></text:p>
      <text:p text:style-name="P264">            &lt;/button&gt;</text:p>
      <text:p text:style-name="P265">          &lt;/div&gt;</text:p>
      <text:p text:style-name="P266"/>
      <text:p text:style-name="P267"><text:span text:style-name="T268">          {</text:span><text:span text:style-name="T269">/* Mobile toggle */</text:span><text:span text:style-name="T270">}</text:span></text:p>
      <text:p text:style-name="P271"><text:span text:style-name="T272">          &lt;div className=</text:span><text:span text:style-name="T273">"lg:hidden flex items-center gap-3"</text:span><text:span text:style-name="T274">&gt;</text:span></text:p>
      <text:p text:style-name="P275">            &lt;button</text:p>
      <text:p text:style-name="P276">              onClick={toggle}</text:p>
      <text:p text:style-name="P277"><text:span text:style-name="T278">              className=</text:span><text:span text:style-name="T279">"flex items-center gap-1 px-2.5 py-1 rounded-full border border-white/30 text-white text-xs font-semibold"</text:span></text:p>
      <text:p text:style-name="P280">            &gt;</text:p>
      <text:p text:style-name="P281"><text:span text:style-name="T282">              &lt;</text:span><text:span text:style-name="T283">Globe</text:span><text:span text:style-name="T284"><text:s/>className=</text:span><text:span text:style-name="T285">"w-3.5 h-3.5"</text:span><text:span text:style-name="T286"><text:s/>/&gt;</text:span></text:p>
      <text:p text:style-name="P287"><text:span text:style-name="T288">              {lang ===<text:s/></text:span><text:span text:style-name="T289">'en'</text:span><text:span text:style-name="T290"><text:s/>?<text:s/></text:span><text:span text:style-name="T291">'PT'</text:span><text:span text:style-name="T292"><text:s/>:<text:s/></text:span><text:span text:style-name="T293">'EN'</text:span><text:span text:style-name="T294">}</text:span></text:p>
      <text:p text:style-name="P295">            &lt;/button&gt;</text:p>
      <text:p text:style-name="P296"><text:span text:style-name="T297">            &lt;button onClick={() =&gt; setMobileOpen(!mobileOpen)} className=</text:span><text:span text:style-name="T298">"text-white"</text:span><text:span text:style-name="T299">&gt;</text:span></text:p>
      <text:p text:style-name="P300"><text:span text:style-name="T301">              {mobileOpen ? &lt;</text:span><text:span text:style-name="T302">X</text:span><text:span text:style-name="T303"><text:s/>className=</text:span><text:span text:style-name="T304">"w-6 h-6"</text:span><text:span text:style-name="T305"><text:s/>/&gt; : &lt;</text:span><text:span text:style-name="T306">Menu</text:span><text:span text:style-name="T307"><text:s/>className=</text:span><text:span text:style-name="T308">"w-6 h-6"</text:span><text:span text:style-name="T309"><text:s/>/&gt;}</text:span></text:p>
      <text:p text:style-name="P310">            &lt;/button&gt;</text:p>
      <text:p text:style-name="P311">          &lt;/div&gt;</text:p>
      <text:p text:style-name="P312">        &lt;/div&gt;</text:p>
      <text:p text:style-name="P313">      &lt;/div&gt;</text:p>
      <text:p text:style-name="P314"/>
      <text:soft-page-break/>
      <text:p text:style-name="P315"><text:span text:style-name="T316">      {</text:span><text:span text:style-name="T317">/* Mobile menu */</text:span><text:span text:style-name="T318">}</text:span></text:p>
      <text:p text:style-name="P319">      {mobileOpen &amp;&amp; (</text:p>
      <text:p text:style-name="P320"><text:span text:style-name="T321">        &lt;div className=</text:span><text:span text:style-name="T322">"lg:hidden bg-[#1A1A2E]/98 backdrop-blur-md border-t border-white/10"</text:span><text:span text:style-name="T323">&gt;</text:span></text:p>
      <text:p text:style-name="P324"><text:span text:style-name="T325">          &lt;div className=</text:span><text:span text:style-name="T326">"px-4 py-4 space-y-1"</text:span><text:span text:style-name="T327">&gt;</text:span></text:p>
      <text:p text:style-name="P328">            {navItems[lang].map((item, i) =&gt; (</text:p>
      <text:p text:style-name="P329">              &lt;button</text:p>
      <text:p text:style-name="P330">                key={sectionIds[i]}</text:p>
      <text:p text:style-name="P331">                onClick={() =&gt; scrollTo(sectionIds[i])}</text:p>
      <text:p text:style-name="P332"><text:span text:style-name="T333">                className=</text:span><text:span text:style-name="T334">"block w-full text-left px-4 py-3 text-sm text-[#FDF8F0]/80 hover:text-[#D4A843] hover:bg-white/5 rounded-lg transition-colors"</text:span></text:p>
      <text:p text:style-name="P335">              &gt;</text:p>
      <text:p text:style-name="P336">                {item}</text:p>
      <text:p text:style-name="P337">              &lt;/button&gt;</text:p>
      <text:p text:style-name="P338">            ))}</text:p>
      <text:p text:style-name="P339">          &lt;/div&gt;</text:p>
      <text:p text:style-name="P340">        &lt;/div&gt;</text:p>
      <text:p text:style-name="P341">      )}</text:p>
      <text:p text:style-name="P342">    &lt;/nav&gt;</text:p>
      <text:p text:style-name="P343">  );</text:p>
      <text:p text:style-name="P344">}</text:p>
      <text:p text:style-name="Normal"><text:line-break/></text:p>
      <text:p text:style-name="Normal"/>
      <text:p text:style-name="Normal">!----------------------------------------------------------------------------------------------------------------------!<text:line-break/><text:span text:style-name="T345">Code Editor - src/components/mcc/HeroSection.jsx</text:span><text:line-break/>import React from 'react';</text:p>
      <text:p text:style-name="Normal">import { useLang } from './LanguageContext';</text:p>
      <text:p text:style-name="Normal">import { motion } from 'framer-motion';</text:p>
      <text:p text:style-name="Normal">import { ChevronDown } from 'lucide-react';</text:p>
      <text:p text:style-name="Normal"/>
      <text:p text:style-name="Normal">export default function HeroSection() {</text:p>
      <text:p text:style-name="Normal">  const { lang } = useLang();</text:p>
      <text:p text:style-name="Normal"/>
      <text:p text:style-name="Normal">  return (</text:p>
      <text:p text:style-name="Normal">    &lt;section className="relative overflow-hidden flex flex-col justify-start" style={{ minHeight: '140vh' }}&gt;</text:p>
      <text:soft-page-break/>
      <text:p text:style-name="Normal">      {/* Background */}</text:p>
      <text:p text:style-name="Normal">      &lt;div className="absolute inset-0"&gt;</text:p>
      <text:p text:style-name="Normal">        &lt;img</text:p>
      <text:p text:style-name="Normal">          src="https://images.unsplash.com/photo-1516026672322-bc52d61a55d5?w=1920&amp;q=80"</text:p>
      <text:p text:style-name="Normal">          alt="Mozambique landscape"</text:p>
      <text:p text:style-name="Normal">          className="w-full h-full object-cover"</text:p>
      <text:p text:style-name="Normal">        /&gt;</text:p>
      <text:p text:style-name="Normal">        &lt;div className="absolute inset-0 bg-gradient-to-b from-black/20 via-black/10 to-transparent" /&gt;</text:p>
      <text:p text:style-name="Normal">      &lt;/div&gt;</text:p>
      <text:p text:style-name="Normal"/>
      <text:p text:style-name="Normal">      &lt;div className="relative z-10 text-center px-6 max-w-4xl mx-auto w-full pt-24 sm:pt-28"&gt;</text:p>
      <text:p text:style-name="Normal">        &lt;motion.div</text:p>
      <text:p text:style-name="Normal">          initial={{ opacity: 0, y: 30 }}</text:p>
      <text:p text:style-name="Normal">          animate={{ opacity: 1, y: 0 }}</text:p>
      <text:p text:style-name="Normal">          transition={{ duration: 1, ease: 'easeOut' }}</text:p>
      <text:p text:style-name="Normal">        &gt;</text:p>
      <text:p text:style-name="Normal">          &lt;h1 className="text-4xl sm:text-5xl md:text-7xl font-bold tracking-tight leading-tight"&gt;</text:p>
      <text:p text:style-name="Normal">            &lt;span className="text-[#D4A843]"&gt;Malalane Cultural Center&lt;/span&gt;</text:p>
      <text:p text:style-name="Normal">          &lt;/h1&gt;</text:p>
      <text:p text:style-name="Normal">          &lt;p className="mt-6 text-sm sm:text-base text-white/90 max-w-3xl mx-auto leading-relaxed whitespace-nowrap"&gt;</text:p>
      <text:p text:style-name="Normal">            {lang === 'en'</text:p>
      <text:p text:style-name="Normal">              ? 'Empowering communities through education, culture, and sustainable development.'</text:p>
      <text:p text:style-name="Normal">             <text:s/><text:span text:style-name="T346">: 'Capacitando comunidades através da educação, cultura e desenvolvimento sustentável.'}</text:span></text:p>
      <text:p text:style-name="Normal"><text:span text:style-name="T347">         <text:s/></text:span>&lt;/p&gt;</text:p>
      <text:soft-page-break/>
      <text:p text:style-name="Normal">        &lt;/motion.div&gt;</text:p>
      <text:p text:style-name="Normal"/>
      <text:p text:style-name="Normal">        &lt;motion.div</text:p>
      <text:p text:style-name="Normal">          initial={{ opacity: 0 }}</text:p>
      <text:p text:style-name="Normal">          animate={{ opacity: 1 }}</text:p>
      <text:p text:style-name="Normal">          transition={{ delay: 1.2, duration: 0.8 }}</text:p>
      <text:p text:style-name="Normal">          className="mt-4"</text:p>
      <text:p text:style-name="Normal">        &gt;</text:p>
      <text:p text:style-name="Normal">          &lt;button</text:p>
      <text:p text:style-name="Normal">            onClick={() =&gt; document.getElementById('who-we-are')?.scrollIntoView({ behavior: 'smooth' })}</text:p>
      <text:p text:style-name="Normal">            className="inline-flex items-center gap-2 px-6 py-2 text-white/80 hover:text-white font-semibold transition-all duration-300 text-sm"</text:p>
      <text:p text:style-name="Normal">          &gt;</text:p>
      <text:p text:style-name="Normal">            {lang === 'en' ? 'Discover More' : 'Saiba Mais'}</text:p>
      <text:p text:style-name="Normal">            &lt;ChevronDown className="w-4 h-4 animate-bounce" /&gt;</text:p>
      <text:p text:style-name="Normal">          &lt;/button&gt;</text:p>
      <text:p text:style-name="Normal">        &lt;/motion.div&gt;</text:p>
      <text:p text:style-name="Normal">      &lt;/div&gt;</text:p>
      <text:h text:style-name="P348" text:outline-level="2"><text:line-break/>!-------------------------------------------------------------------------------------------------!<text:line-break/><text:span text:style-name="T349">Code Editor - src/components/mcc/WhoWeAre.jsx</text:span></text:h>
      <text:p text:style-name="Normal"><text:line-break/>import React from 'react';</text:p>
      <text:p text:style-name="Normal">import { useLang } from './LanguageContext';</text:p>
      <text:p text:style-name="Normal">import { motion } from 'framer-motion';</text:p>
      <text:soft-page-break/>
      <text:p text:style-name="Normal">import { Users } from 'lucide-react';</text:p>
      <text:p text:style-name="Normal"/>
      <text:p text:style-name="Normal">const content = {</text:p>
      <text:p text:style-name="Normal">  en: {</text:p>
      <text:p text:style-name="Normal">    title: 'Who We Are',</text:p>
      <text:p text:style-name="Normal">    text: 'The Malalane Cultural Center is an independent non-governmental organization (NGO) based in Mozambique, with branches in Europe (Portugal) and North America (Canada). The Board of Directors includes individuals from all walks of life, from the public to the private sector, academics, artists, sports personalities, and representatives from non-profit organizations and community activists. Inclusion, diversity, equality, building resilient communities, special support for our elders, and youth empowerment are at the core of everything we do.',</text:p>
      <text:p text:style-name="Normal"> <text:s/><text:span text:style-name="T350">},</text:span></text:p>
      <text:p text:style-name="P351">  pt: {</text:p>
      <text:p text:style-name="P352">    title: 'Quem Somos',</text:p>
      <text:p text:style-name="P353">    text: 'O Centro Cultural Malalane é uma organização não-Governamental independente sem fins lucrativos (ONG), com sede em Moçambique e com delegações na Europa (Portugal) e América do Norte (Canadá). Os Membros do Conselho de Administração incluem personalidades de todas as esferas da vida, do sector público ao privado, Académicos, Artistas, Personalidades do desporto e de Organizações sem fins lucrativos e Activistas comunitários de base. Inclusão, diversidade, igualdade, construção de comunidades resilientes, especial apoio aos nossos anciãos e capacitação de jovens estão no centro de tudo o que fazemos.',</text:p>
      <text:p text:style-name="Normal"><text:span text:style-name="T354"> <text:s/></text:span>},</text:p>
      <text:p text:style-name="Normal">};</text:p>
      <text:p text:style-name="Normal"/>
      <text:p text:style-name="Normal">export default function WhoWeAre() {</text:p>
      <text:p text:style-name="Normal">  const { lang } = useLang();</text:p>
      <text:p text:style-name="Normal">  const c = content[lang];</text:p>
      <text:p text:style-name="Normal"/>
      <text:p text:style-name="Normal">  return (</text:p>
      <text:soft-page-break/>
      <text:p text:style-name="Normal">    &lt;section id="who-we-are" className="py-24 sm:py-32 bg-[#FDF8F0]"&gt;</text:p>
      <text:p text:style-name="Normal">      &lt;div className="max-w-5xl mx-auto px-6"&gt;</text:p>
      <text:p text:style-name="Normal">        &lt;motion.div</text:p>
      <text:p text:style-name="Normal">          initial={{ opacity: 0, y: 40 }}</text:p>
      <text:p text:style-name="Normal">          whileInView={{ opacity: 1, y: 0 }}</text:p>
      <text:p text:style-name="Normal">          viewport={{ once: true, margin: '-100px' }}</text:p>
      <text:p text:style-name="Normal">          transition={{ duration: 0.8 }}</text:p>
      <text:p text:style-name="Normal">          className="text-center"</text:p>
      <text:p text:style-name="Normal">        &gt;</text:p>
      <text:p text:style-name="Normal">          &lt;div className="inline-flex items-center justify-center w-14 h-14 rounded-2xl bg-[#2D6A4F]/10 mb-6"&gt;</text:p>
      <text:p text:style-name="Normal">            &lt;Users className="w-7 h-7 text-[#2D6A4F]" /&gt;</text:p>
      <text:p text:style-name="Normal">          &lt;/div&gt;</text:p>
      <text:p text:style-name="Normal">          &lt;h2 className="text-3xl sm:text-4xl md:text-5xl font-bold text-[#1A1A2E] tracking-tight"&gt;</text:p>
      <text:p text:style-name="Normal">            {c.title}</text:p>
      <text:p text:style-name="Normal">          &lt;/h2&gt;</text:p>
      <text:p text:style-name="Normal">          &lt;div className="mt-4 w-16 h-1 bg-gradient-to-r from-[#C05621] to-[#D4A843] mx-auto rounded-full" /&gt;</text:p>
      <text:p text:style-name="Normal">        &lt;/motion.div&gt;</text:p>
      <text:p text:style-name="Normal"/>
      <text:p text:style-name="Normal">        &lt;motion.div</text:p>
      <text:p text:style-name="Normal">          initial={{ opacity: 0, y: 30 }}</text:p>
      <text:p text:style-name="Normal">          whileInView={{ opacity: 1, y: 0 }}</text:p>
      <text:p text:style-name="Normal">          viewport={{ once: true, margin: '-80px' }}</text:p>
      <text:p text:style-name="Normal">          transition={{ duration: 0.8, delay: 0.2 }}</text:p>
      <text:p text:style-name="Normal">          className="mt-12 max-w-3xl mx-auto"</text:p>
      <text:p text:style-name="Normal">        &gt;</text:p>
      <text:soft-page-break/>
      <text:p text:style-name="Normal">          &lt;p className="text-lg leading-relaxed text-[#1A1A2E]/70 text-center"&gt;</text:p>
      <text:p text:style-name="Normal">            {c.text}</text:p>
      <text:p text:style-name="Normal">          &lt;/p&gt;</text:p>
      <text:p text:style-name="Normal">        &lt;/motion.div&gt;</text:p>
      <text:p text:style-name="Normal"/>
      <text:p text:style-name="Normal">        {/* Decorative image strip */}</text:p>
      <text:p text:style-name="Normal">        &lt;motion.div</text:p>
      <text:p text:style-name="Normal">          initial={{ opacity: 0, scale: 0.95 }}</text:p>
      <text:p text:style-name="Normal">          whileInView={{ opacity: 1, scale: 1 }}</text:p>
      <text:p text:style-name="Normal">          viewport={{ once: true }}</text:p>
      <text:p text:style-name="Normal">          transition={{ duration: 0.8, delay: 0.4 }}</text:p>
      <text:p text:style-name="Normal">          className="mt-16 grid grid-cols-3 gap-3 sm:gap-4 rounded-2xl overflow-hidden"</text:p>
      <text:p text:style-name="Normal">        &gt;</text:p>
      <text:p text:style-name="Normal">          &lt;img src="https://media.base44.com/images/public/69a93b29a4a5a09a87751ceb/ade06ae17_image.png" alt="African community gathering" className="w-full h-40 sm:h-56 object-cover rounded-xl" /&gt;</text:p>
      <text:p text:style-name="Normal">          &lt;img src="https://images.unsplash.com/photo-1515657834497-26509e295154?w=600&amp;q=80" alt="Cultural celebration" className="w-full h-40 sm:h-56 object-cover rounded-xl" /&gt;</text:p>
      <text:p text:style-name="Normal">          &lt;img src="https://images.unsplash.com/photo-1710093072218-0024b8391475?w=600&amp;q=80" alt="Community outreach" className="w-full h-40 sm:h-56 object-cover rounded-xl" /&gt;</text:p>
      <text:p text:style-name="Normal">        &lt;/motion.div&gt;</text:p>
      <text:p text:style-name="Normal">      &lt;/div&gt;</text:p>
      <text:p text:style-name="Normal">    &lt;/section&gt;</text:p>
      <text:p text:style-name="Normal">  );</text:p>
      <text:p text:style-name="Normal">}</text:p>
      <text:p text:style-name="Normal"/>
      <text:h text:style-name="P355" text:outline-level="2">!--------------------------------------------------------------------------------------------!<text:line-break/><text:span text:style-name="T356">Code Editor - src/components/mcc/MissionSection.jsx</text:span><text:line-break/>import React from 'react';</text:h>
      <text:p text:style-name="Normal">import { useLang } from './LanguageContext';</text:p>
      <text:p text:style-name="Normal">import { motion } from 'framer-motion';</text:p>
      <text:p text:style-name="Normal">import { Target } from 'lucide-react';</text:p>
      <text:p text:style-name="Normal"/>
      <text:p text:style-name="Normal">const content = {</text:p>
      <text:p text:style-name="Normal">  en: {</text:p>
      <text:p text:style-name="Normal">    title: 'Mission',</text:p>
      <text:p text:style-name="Normal">    text: 'Our mission is to empower underserved communities in Dunhe-Zavala by addressing pressing challenges such as poverty, inadequate education, lack of clean water and limited access to healthcare. We are committed to fostering sustainable development through innovative solutions, community engagement, and a dedication to principles of equity, transparency, and inclusivity. Our vision is a future where every individual in our Community has the opportunity to thrive and achieve their full potential.',</text:p>
      <text:p text:style-name="Normal"> <text:s/><text:span text:style-name="T357">},</text:span></text:p>
      <text:p text:style-name="P358">  pt: {</text:p>
      <text:p text:style-name="P359">    title: 'Missão',</text:p>
      <text:p text:style-name="P360">    text: 'A nossa missão é capacitar as comunidades desfavorecidas de Zavala, enfrentando desafios tais como a pobreza extrema, falta de água potável, educação inadequada e dificuldades de acesso à saúde. É nosso compromisso promover uma mudança sustentável através de soluções inovadoras, engajamento comunitário, sempre norteados pela dedicação aos princípios de equidade, transparência e inclusão. A nossa visão é a de um futuro em que cada indivíduo na nossa Comunidade tenha a oportunidade de prosperar e alcançar seu pleno potencial.',</text:p>
      <text:p text:style-name="Normal"><text:span text:style-name="T361"> <text:s/></text:span>},</text:p>
      <text:p text:style-name="Normal">};</text:p>
      <text:p text:style-name="Normal"/>
      <text:soft-page-break/>
      <text:p text:style-name="Normal">export default function MissionSection() {</text:p>
      <text:p text:style-name="Normal">  const { lang } = useLang();</text:p>
      <text:p text:style-name="Normal">  const c = content[lang];</text:p>
      <text:p text:style-name="Normal"/>
      <text:p text:style-name="Normal">  return (</text:p>
      <text:p text:style-name="Normal">    &lt;section id="mission" className="py-24 sm:py-32 bg-[#1A1A2E] relative overflow-hidden"&gt;</text:p>
      <text:p text:style-name="Normal">      {/* Decorative circle */}</text:p>
      <text:p text:style-name="Normal">      &lt;div className="absolute -top-40 -right-40 w-96 h-96 rounded-full bg-[#C05621]/5" /&gt;</text:p>
      <text:p text:style-name="Normal">      &lt;div className="absolute -bottom-20 -left-20 w-64 h-64 rounded-full bg-[#D4A843]/5" /&gt;</text:p>
      <text:p text:style-name="Normal"/>
      <text:p text:style-name="Normal">      &lt;div className="max-w-5xl mx-auto px-6 relative z-10"&gt;</text:p>
      <text:p text:style-name="Normal">        &lt;div className="grid md:grid-cols-2 gap-12 items-center"&gt;</text:p>
      <text:p text:style-name="Normal">          {/* Left: image */}</text:p>
      <text:p text:style-name="Normal">          &lt;motion.div</text:p>
      <text:p text:style-name="Normal">            initial={{ opacity: 0, x: -40 }}</text:p>
      <text:p text:style-name="Normal">            whileInView={{ opacity: 1, x: 0 }}</text:p>
      <text:p text:style-name="Normal">            viewport={{ once: true, margin: '-100px' }}</text:p>
      <text:p text:style-name="Normal">            transition={{ duration: 0.8 }}</text:p>
      <text:p text:style-name="Normal">          &gt;</text:p>
      <text:p text:style-name="Normal">            &lt;img</text:p>
      <text:p text:style-name="Normal">              src="https://images.unsplash.com/photo-1761666520005-3ffcf13e74c8?w=800&amp;q=80"</text:p>
      <text:p text:style-name="Normal">              alt="African community members in discussion"</text:p>
      <text:p text:style-name="Normal">              className="w-full h-80 object-cover rounded-2xl shadow-xl"</text:p>
      <text:p text:style-name="Normal">            /&gt;</text:p>
      <text:p text:style-name="Normal">          &lt;/motion.div&gt;</text:p>
      <text:p text:style-name="Normal"/>
      <text:soft-page-break/>
      <text:p text:style-name="Normal">          {/* Right: text */}</text:p>
      <text:p text:style-name="Normal">          &lt;motion.div</text:p>
      <text:p text:style-name="Normal">            initial={{ opacity: 0, x: 40 }}</text:p>
      <text:p text:style-name="Normal">            whileInView={{ opacity: 1, x: 0 }}</text:p>
      <text:p text:style-name="Normal">            viewport={{ once: true, margin: '-100px' }}</text:p>
      <text:p text:style-name="Normal">            transition={{ duration: 0.8, delay: 0.2 }}</text:p>
      <text:p text:style-name="Normal">          &gt;</text:p>
      <text:p text:style-name="Normal">            &lt;div className="inline-flex items-center justify-center w-14 h-14 rounded-2xl bg-[#C05621]/15 mb-6"&gt;</text:p>
      <text:p text:style-name="Normal">              &lt;Target className="w-7 h-7 text-[#C05621]" /&gt;</text:p>
      <text:p text:style-name="Normal">            &lt;/div&gt;</text:p>
      <text:p text:style-name="Normal">            &lt;h2 className="text-3xl sm:text-4xl font-bold text-[#FDF8F0] tracking-tight"&gt;</text:p>
      <text:p text:style-name="Normal">              {c.title}</text:p>
      <text:p text:style-name="Normal">            &lt;/h2&gt;</text:p>
      <text:p text:style-name="Normal">            &lt;div className="mt-4 w-16 h-1 bg-gradient-to-r from-[#C05621] to-[#D4A843] rounded-full" /&gt;</text:p>
      <text:p text:style-name="Normal">            &lt;p className="mt-8 text-lg leading-relaxed text-[#FDF8F0]/70"&gt;</text:p>
      <text:p text:style-name="Normal">              {c.text}</text:p>
      <text:p text:style-name="Normal">            &lt;/p&gt;</text:p>
      <text:p text:style-name="Normal">          &lt;/motion.div&gt;</text:p>
      <text:p text:style-name="Normal">        &lt;/div&gt;</text:p>
      <text:p text:style-name="Normal">      &lt;/div&gt;</text:p>
      <text:p text:style-name="Normal">    &lt;/section&gt;</text:p>
      <text:p text:style-name="Normal">  );</text:p>
      <text:p text:style-name="Normal">}</text:p>
      <text:p text:style-name="Normal"/>
      <text:soft-page-break/>
      <text:h text:style-name="P362" text:outline-level="2">!--------------------------------------------------------------------------------------------!<text:line-break/><text:span text:style-name="T363">Code Editor - src/components/mcc/VisionSection.jsx</text:span></text:h>
      <text:p text:style-name="P364"><text:span text:style-name="T365">import</text:span><text:span text:style-name="T366"><text:s/></text:span><text:span text:style-name="T367">React</text:span><text:span text:style-name="T368"><text:s/></text:span><text:span text:style-name="T369">from</text:span><text:span text:style-name="T370"><text:s/></text:span><text:span text:style-name="T371">'react'</text:span><text:span text:style-name="T372">;</text:span></text:p>
      <text:p text:style-name="P373"><text:span text:style-name="T374">import</text:span><text:span text:style-name="T375"><text:s/>{ useLang }<text:s/></text:span><text:span text:style-name="T376">from</text:span><text:span text:style-name="T377"><text:s/></text:span><text:span text:style-name="T378">'./LanguageContext'</text:span><text:span text:style-name="T379">;</text:span></text:p>
      <text:p text:style-name="P380"><text:span text:style-name="T381">import</text:span><text:span text:style-name="T382"><text:s/>{ motion }<text:s/></text:span><text:span text:style-name="T383">from</text:span><text:span text:style-name="T384"><text:s/></text:span><text:span text:style-name="T385">'framer-motion'</text:span><text:span text:style-name="T386">;</text:span></text:p>
      <text:p text:style-name="P387"><text:span text:style-name="T388">import</text:span><text:span text:style-name="T389"><text:s/>{<text:s/></text:span><text:span text:style-name="T390">Eye</text:span><text:span text:style-name="T391"><text:s/>}<text:s/></text:span><text:span text:style-name="T392">from</text:span><text:span text:style-name="T393"><text:s/></text:span><text:span text:style-name="T394">'lucide-react'</text:span><text:span text:style-name="T395">;</text:span></text:p>
      <text:p text:style-name="P396"/>
      <text:p text:style-name="P397"><text:span text:style-name="T398">const</text:span><text:span text:style-name="T399"><text:s/>content = {</text:span></text:p>
      <text:p text:style-name="P400">  en: {</text:p>
      <text:p text:style-name="P401"><text:span text:style-name="T402">    title:<text:s/></text:span><text:span text:style-name="T403">'Vision'</text:span><text:span text:style-name="T404">,</text:span></text:p>
      <text:p text:style-name="P405"><text:span text:style-name="T406">    text:<text:s/></text:span><text:span text:style-name="T407">'We strive to be a transformative beacon in fostering a thriving future through education, cultural enrichment, self-sufficiency, inclusivity, ethical leadership, and sustainable progress. We aspire to create a resilient and interconnected community, celebrating tradition while embracing innovation, leaving a lasting legacy of positive change.'</text:span><text:span text:style-name="T408">,</text:span></text:p>
      <text:p text:style-name="P409"><text:span text:style-name="T410"> <text:s/></text:span><text:span text:style-name="T411">},</text:span></text:p>
      <text:p text:style-name="P412">  pt: {</text:p>
      <text:p text:style-name="P413"><text:span text:style-name="T414">    title:<text:s/></text:span><text:span text:style-name="T415">'Visão'</text:span><text:span text:style-name="T416">,</text:span></text:p>
      <text:p text:style-name="P417"><text:span text:style-name="T418">    text:<text:s/></text:span><text:span text:style-name="T419">'Empenhamo-nos por ser um polo de referência na procura de um futuro próspero através da educação, enriquecimento cultural, auto-suficiência, inclusão, liderança ética e progresso sustentável. Aspiramos por criar uma comunidade resiliente e integrada, celebrando as nossas tradições enquanto abraçamos a inovação, visando deixar um legado duradouro de mudança positiva.'</text:span><text:span text:style-name="T420">,</text:span></text:p>
      <text:p text:style-name="P421"><text:span text:style-name="T422"> <text:s/></text:span><text:span text:style-name="T423">},</text:span></text:p>
      <text:p text:style-name="P424">};</text:p>
      <text:p text:style-name="P425"/>
      <text:p text:style-name="P426"><text:span text:style-name="T427">export</text:span><text:span text:style-name="T428"><text:s/></text:span><text:span text:style-name="T429">default</text:span><text:span text:style-name="T430"><text:s/></text:span><text:span text:style-name="T431">function</text:span><text:span text:style-name="T432"><text:s/></text:span><text:span text:style-name="T433">VisionSection</text:span><text:span text:style-name="T434">() {</text:span></text:p>
      <text:p text:style-name="P435"><text:span text:style-name="T436"> <text:s/></text:span><text:span text:style-name="T437">const</text:span><text:span text:style-name="T438"><text:s/>{ lang } = useLang();</text:span></text:p>
      <text:p text:style-name="P439"><text:span text:style-name="T440"> <text:s/></text:span><text:span text:style-name="T441">const</text:span><text:span text:style-name="T442"><text:s/>c = content[lang];</text:span></text:p>
      <text:p text:style-name="P443"/>
      <text:p text:style-name="P444"><text:span text:style-name="T445"> <text:s/></text:span><text:span text:style-name="T446">return</text:span><text:span text:style-name="T447"><text:s/>(</text:span></text:p>
      <text:p text:style-name="P448"><text:span text:style-name="T449">    &lt;section id=</text:span><text:span text:style-name="T450">"vision"</text:span><text:span text:style-name="T451"><text:s/>className=</text:span><text:span text:style-name="T452">"py-24 sm:py-32 bg-[#FDF8F0] relative overflow-hidden"</text:span><text:span text:style-name="T453">&gt;</text:span></text:p>
      <text:p text:style-name="P454"><text:span text:style-name="T455">      &lt;div className=</text:span><text:span text:style-name="T456">"max-w-5xl mx-auto px-6"</text:span><text:span text:style-name="T457">&gt;</text:span></text:p>
      <text:p text:style-name="P458"><text:span text:style-name="T459">        &lt;div className=</text:span><text:span text:style-name="T460">"grid md:grid-cols-2 gap-12 items-center"</text:span><text:span text:style-name="T461">&gt;</text:span></text:p>
      <text:p text:style-name="P462">          &lt;motion.div</text:p>
      <text:p text:style-name="P463"><text:span text:style-name="T464">            initial={{ opacity:<text:s/></text:span><text:span text:style-name="T465">0</text:span><text:span text:style-name="T466">, x: -</text:span><text:span text:style-name="T467">40</text:span><text:span text:style-name="T468"><text:s/>}}</text:span></text:p>
      <text:p text:style-name="P469"><text:span text:style-name="T470">            whileInView={{ opacity:<text:s/></text:span><text:span text:style-name="T471">1</text:span><text:span text:style-name="T472">, x:<text:s/></text:span><text:span text:style-name="T473">0</text:span><text:span text:style-name="T474"><text:s/>}}</text:span></text:p>
      <text:p text:style-name="P475"><text:span text:style-name="T476">            viewport={{ once:<text:s/></text:span><text:span text:style-name="T477">true</text:span><text:span text:style-name="T478">, margin:<text:s/></text:span><text:span text:style-name="T479">'-100px'</text:span><text:span text:style-name="T480"><text:s/>}}</text:span></text:p>
      <text:p text:style-name="P481"><text:span text:style-name="T482">            transition={{ duration:<text:s/></text:span><text:span text:style-name="T483">0.8</text:span><text:span text:style-name="T484"><text:s/>}}</text:span></text:p>
      <text:p text:style-name="P485">          &gt;</text:p>
      <text:p text:style-name="P486">            &lt;img</text:p>
      <text:p text:style-name="P487"><text:span text:style-name="T488">              src=</text:span><text:span text:style-name="T489">"https://images.unsplash.com/photo-1760873059715-7c7cfbe2a2c6?w=800&amp;q=80"</text:span></text:p>
      <text:p text:style-name="P490"><text:span text:style-name="T491">              alt=</text:span><text:span text:style-name="T492">"Children at a village water pump, East Africa"</text:span></text:p>
      <text:p text:style-name="P493"><text:span text:style-name="T494">              className=</text:span><text:span text:style-name="T495">"w-full h-80 object-cover rounded-2xl shadow-xl"</text:span></text:p>
      <text:soft-page-break/>
      <text:p text:style-name="P496">            /&gt;</text:p>
      <text:p text:style-name="P497">          &lt;/motion.div&gt;</text:p>
      <text:p text:style-name="P498"/>
      <text:p text:style-name="P499">          &lt;motion.div</text:p>
      <text:p text:style-name="P500"><text:span text:style-name="T501">            initial={{ opacity:<text:s/></text:span><text:span text:style-name="T502">0</text:span><text:span text:style-name="T503">, x:<text:s/></text:span><text:span text:style-name="T504">40</text:span><text:span text:style-name="T505"><text:s/>}}</text:span></text:p>
      <text:p text:style-name="P506"><text:span text:style-name="T507">            whileInView={{ opacity:<text:s/></text:span><text:span text:style-name="T508">1</text:span><text:span text:style-name="T509">, x:<text:s/></text:span><text:span text:style-name="T510">0</text:span><text:span text:style-name="T511"><text:s/>}}</text:span></text:p>
      <text:p text:style-name="P512"><text:span text:style-name="T513">            viewport={{ once:<text:s/></text:span><text:span text:style-name="T514">true</text:span><text:span text:style-name="T515">, margin:<text:s/></text:span><text:span text:style-name="T516">'-100px'</text:span><text:span text:style-name="T517"><text:s/>}}</text:span></text:p>
      <text:p text:style-name="P518"><text:span text:style-name="T519">            transition={{ duration:<text:s/></text:span><text:span text:style-name="T520">0.8</text:span><text:span text:style-name="T521">, delay:<text:s/></text:span><text:span text:style-name="T522">0.2</text:span><text:span text:style-name="T523"><text:s/>}}</text:span></text:p>
      <text:p text:style-name="P524">          &gt;</text:p>
      <text:p text:style-name="P525"><text:span text:style-name="T526">            &lt;div className=</text:span><text:span text:style-name="T527">"inline-flex items-center justify-center w-14 h-14 rounded-2xl bg-[#D4A843]/15 mb-6"</text:span><text:span text:style-name="T528">&gt;</text:span></text:p>
      <text:p text:style-name="P529"><text:span text:style-name="T530">              &lt;</text:span><text:span text:style-name="T531">Eye</text:span><text:span text:style-name="T532"><text:s/>className=</text:span><text:span text:style-name="T533">"w-7 h-7 text-[#D4A843]"</text:span><text:span text:style-name="T534"><text:s/>/&gt;</text:span></text:p>
      <text:p text:style-name="P535">            &lt;/div&gt;</text:p>
      <text:p text:style-name="P536"><text:span text:style-name="T537">            &lt;h2 className=</text:span><text:span text:style-name="T538">"text-3xl sm:text-4xl font-bold text-[#1A1A2E] tracking-tight"</text:span><text:span text:style-name="T539">&gt;</text:span></text:p>
      <text:p text:style-name="P540">              {c.title}</text:p>
      <text:p text:style-name="P541">            &lt;/h2&gt;</text:p>
      <text:p text:style-name="P542"><text:span text:style-name="T543">            &lt;div className=</text:span><text:span text:style-name="T544">"mt-4 w-16 h-1 bg-gradient-to-r from-[#C05621] to-[#D4A843] rounded-full"</text:span><text:span text:style-name="T545"><text:s/>/&gt;</text:span></text:p>
      <text:p text:style-name="P546"><text:span text:style-name="T547">            &lt;p className=</text:span><text:span text:style-name="T548">"mt-8 text-lg leading-relaxed text-[#1A1A2E]/70"</text:span><text:span text:style-name="T549">&gt;</text:span></text:p>
      <text:p text:style-name="P550">              {c.text}</text:p>
      <text:p text:style-name="P551">            &lt;/p&gt;</text:p>
      <text:p text:style-name="P552">          &lt;/motion.div&gt;</text:p>
      <text:p text:style-name="P553">        &lt;/div&gt;</text:p>
      <text:p text:style-name="P554">      &lt;/div&gt;</text:p>
      <text:p text:style-name="P555">    &lt;/section&gt;</text:p>
      <text:p text:style-name="P556">  );</text:p>
      <text:p text:style-name="P557">}</text:p>
      <text:p text:style-name="Normal"/>
      <text:p text:style-name="Normal">!------------------------------------------------------------------------------------------------------------!<text:line-break/><text:span text:style-name="T558">Code Editor - src/components/mcc/WhatWeDo.jsx</text:span></text:p>
      <text:p text:style-name="Normal">import React, { useState } from 'react';</text:p>
      <text:p text:style-name="Normal">import { useLang } from './LanguageContext';</text:p>
      <text:p text:style-name="Normal">import { motion, AnimatePresence } from 'framer-motion';</text:p>
      <text:p text:style-name="Normal">import { GraduationCap, Cpu, Heart, Shield } from 'lucide-react';</text:p>
      <text:p text:style-name="Normal"/>
      <text:p text:style-name="Normal">const tabs = [</text:p>
      <text:p text:style-name="Normal">  { id: 'education', icon: GraduationCap },</text:p>
      <text:p text:style-name="Normal">  { id: 'technology', icon: Cpu },</text:p>
      <text:soft-page-break/>
      <text:p text:style-name="Normal">  { id: 'solidarity', icon: Heart },</text:p>
      <text:p text:style-name="Normal">  { id: 'citizenship', icon: Shield },</text:p>
      <text:p text:style-name="Normal">];</text:p>
      <text:p text:style-name="Normal"/>
      <text:p text:style-name="Normal">const tabLabels = {</text:p>
      <text:p text:style-name="Normal">  en: { education: 'Education', technology: 'Technology', solidarity: 'Solidarity &amp; Resilience', citizenship: 'Citizenship' },</text:p>
      <text:p text:style-name="Normal">  pt: { education: 'Educação', technology: 'Tecnologia', solidarity: 'Solidariedade e Resiliência', citizenship: 'Cidadania' },</text:p>
      <text:p text:style-name="Normal">};</text:p>
      <text:p text:style-name="Normal"/>
      <text:p text:style-name="Normal">const content = {</text:p>
      <text:p text:style-name="Normal">  en: {</text:p>
      <text:p text:style-name="Normal">    title: 'What We Do',</text:p>
      <text:p text:style-name="Normal">    education: [</text:p>
      <text:p text:style-name="Normal">      'Community learning center with classrooms and resources for both formal education and vocational training.',</text:p>
      <text:p text:style-name="Normal">      'Scholarship programs for underprivileged students to access quality education.',</text:p>
      <text:p text:style-name="Normal">      'Workshops on financial literacy, entrepreneurship, and job readiness to enhance economic opportunities.',</text:p>
      <text:p text:style-name="Normal">      'Partner with local schools and universities, Government institutions, private sector to provide educational support and resources.',</text:p>
      <text:p text:style-name="Normal">      'Adult literacy programs to empower adults with basic reading and writing skills.',</text:p>
      <text:p text:style-name="Normal">      'Integrate life skills, ethics, and citizenship education to foster values like empathy, responsibility, and respect in particular towards our Elders.',</text:p>
      <text:p text:style-name="Normal">    ],</text:p>
      <text:p text:style-name="Normal">    technology: [</text:p>
      <text:soft-page-break/>
      <text:p text:style-name="Normal">      'Community technology center (E-Learning Platform, provide Low-cost devices, and set up a Digital Library) with access to computers, internet, and digital learning resources.',</text:p>
      <text:p text:style-name="Normal">      'Harness the power of technology to change lives (remote learning, financial literacy).',</text:p>
      <text:p text:style-name="Normal">      'Technology training and workshops to equip community members with digital skills.',</text:p>
      <text:p text:style-name="Normal">      'Mobile banking services to remote areas, allowing people to save, borrow, and transfer money securely.',</text:p>
      <text:p text:style-name="Normal">      'Technology to improve healthcare services, such as telemedicine and health monitoring applications.',</text:p>
      <text:p text:style-name="Normal">      'Sustainable energy solutions and green technologies to improve living conditions (solar panels, biogas).',</text:p>
      <text:p text:style-name="Normal">      'Community to take ownership of the center and its initiatives and create a sense of pride and belonging in working towards shared goals.',</text:p>
      <text:p text:style-name="Normal">    ],</text:p>
      <text:p text:style-name="Normal">    solidarity: [</text:p>
      <text:p text:style-name="Normal">      'Support groups for vulnerable members, such as elderly, youth, and women, to provide social and emotional support.',</text:p>
      <text:p text:style-name="Normal">      'Intergenerational programs that facilitate the exchange of knowledge and skills between elders, youth, and women.',</text:p>
      <text:p text:style-name="Normal">      'Community celebrations, cultural events, and festivals to foster a sense of togetherness and unity.',</text:p>
      <text:p text:style-name="Normal">      'Initiatives that address specific challenges faced by the community, such as access to clean water or healthcare.',</text:p>
      <text:p text:style-name="Normal">      'Technology solutions to improve Community resilience (fish farming, greenhouse farming, drought &amp; pests tolerant crops).',</text:p>
      <text:p text:style-name="Normal">    ],</text:p>
      <text:p text:style-name="Normal">    citizenship: [</text:p>
      <text:p text:style-name="Normal">      'Awareness about the negative effects of rampant corruption in our country and its impact on the community.',</text:p>
      <text:p text:style-name="Normal">      'Community cleanups and conservation efforts to instill a sense of environmental responsibility.',</text:p>
      <text:soft-page-break/>
      <text:p text:style-name="Normal">      'Awards and recognition programs that celebrate and honor good citizenship and community contributions.',</text:p>
      <text:p text:style-name="Normal">      'Cultural festivals and events that celebrate diversity and foster community pride.',</text:p>
      <text:p text:style-name="Normal">   <text:s/><text:span text:style-name="T559">],</text:span></text:p>
      <text:p text:style-name="P560">  },</text:p>
      <text:p text:style-name="P561">  pt: {</text:p>
      <text:p text:style-name="P562">    title: 'O Que Fazemos',</text:p>
      <text:p text:style-name="P563">    education: [</text:p>
      <text:p text:style-name="P564">      'Centro de aprendizagem comunitário com salas de aulas e recursos para educação formal e formação profissional.',</text:p>
      <text:p text:style-name="P565">      'Programas de bolsas de estudo para estudantes desfavorecidos terem acesso à educação de qualidade.',</text:p>
      <text:p text:style-name="P566">      'Seminários sobre educação financeira, empreendedorismo e preparação para a vida activa e desta forma melhorar oportunidades económicas.',</text:p>
      <text:p text:style-name="P567">      'Parcerias com Escolas e Universidades locais, Instituições Governamentais e do sector privado para fornecer suporte educacional e recursos.',</text:p>
      <text:p text:style-name="P568">      'Programas de alfabetização de adultos para capacitar adultos com habilidades básicas de leitura e escrita.',</text:p>
      <text:p text:style-name="P569">      'Habilitações para a vida, ética e educação cívica para promover valores como empatia, responsabilidade e respeito em particular para com os idosos (as nossas Bibliotecas Vivas).',</text:p>
      <text:p text:style-name="P570">    ],</text:p>
      <text:p text:style-name="P571">    technology: [</text:p>
      <text:p text:style-name="P572">      'Centro de tecnologia comunitário (Plataforma de E-Learning, instrumentos de aprendizagem de baixo custo e uma Biblioteca Digital) com acesso a computadores, internet e recursos de aprendizagem digital.',</text:p>
      <text:p text:style-name="P573">      'Tecnologia como ferramenta para mudar vidas (aprendizagem remota, educação financeira).',</text:p>
      <text:p text:style-name="P574">      'Formação e seminários de tecnologia para equipar membros da comunidade com conhecimentos digitais básicos.',</text:p>
      <text:soft-page-break/>
      <text:p text:style-name="P575">      'Serviços de "banco móvel" para áreas remotas, permitindo que as pessoas economizem, emprestem e transfiram dinheiro com segurança.',</text:p>
      <text:p text:style-name="P576">      'Tecnologia para melhorar os serviços de saúde, como telemedicina e aplicações de monitorização de saúde.',</text:p>
      <text:p text:style-name="P577">      'Soluções de energia sustentável e tecnologias verdes para melhorar as condições de vida da Comunidade (painéis solares, biogás).',</text:p>
      <text:p text:style-name="P578">      'Consciencialização da comunidade para assumir a responsabilidade pelo Centro e suas iniciativas e criar um senso de orgulho e responsabilidade na prossecução das metas definidas pela Comunidade.',</text:p>
      <text:p text:style-name="P579">    ],</text:p>
      <text:p text:style-name="P580">    solidarity: [</text:p>
      <text:p text:style-name="P581">      'Grupos de apoio para membros vulneráveis, tais como idosos, jovens e mulheres, para fornecer apoio social e emocional.',</text:p>
      <text:p text:style-name="P582">      'Programas intergeracionais que facilitem a troca de conhecimentos e experiências entre idosos, jovens e mulheres.',</text:p>
      <text:p text:style-name="P583">      'Celebrações comunitárias, eventos culturais e festivais para promover um sentimento de unidade.',</text:p>
      <text:p text:style-name="P584">      'Iniciativas que abordem desafios específicos enfrentados pela comunidade, tais como acesso a água potável ou cuidados de saúde.',</text:p>
      <text:p text:style-name="P585">      'Soluções tecnológicas para melhorar a resiliência da comunidade (piscicultura, agricultura em estufa, culturas tolerantes à seca e pragas).',</text:p>
      <text:p text:style-name="P586">    ],</text:p>
      <text:p text:style-name="P587">    citizenship: [</text:p>
      <text:p text:style-name="P588">      'Consciencialização da Comunidade sobre os efeitos negativos da corrupção desenfreada no nosso país e seu impacto na Comunidade.',</text:p>
      <text:p text:style-name="P589">      'Organização de iniciativas de limpezas comunitárias e esforços de conservação para incutir um sentido de responsabilidade ambiental.',</text:p>
      <text:p text:style-name="P590">      'Programas de prémios e reconhecimento que celebrem a boa cidadania e as contribuições para a comunidade.',</text:p>
      <text:soft-page-break/>
      <text:p text:style-name="P591">      'Festivais culturais e eventos que celebrem a diversidade e promovam o orgulho da comunidade.',</text:p>
      <text:p text:style-name="Normal"><text:span text:style-name="T592">   <text:s/></text:span>],</text:p>
      <text:p text:style-name="Normal">  },</text:p>
      <text:p text:style-name="Normal">};</text:p>
      <text:p text:style-name="Normal"/>
      <text:p text:style-name="Normal">export default function WhatWeDo() {</text:p>
      <text:p text:style-name="Normal">  const { lang } = useLang();</text:p>
      <text:p text:style-name="Normal">  const c = content[lang];</text:p>
      <text:p text:style-name="Normal">  const [active, setActive] = useState('education');</text:p>
      <text:p text:style-name="Normal"/>
      <text:p text:style-name="Normal">  return (</text:p>
      <text:p text:style-name="Normal">    &lt;section id="what-we-do" className="py-24 sm:py-32 bg-[#1A1A2E]"&gt;</text:p>
      <text:p text:style-name="Normal">      &lt;div className="max-w-6xl mx-auto px-6"&gt;</text:p>
      <text:p text:style-name="Normal">        &lt;motion.div</text:p>
      <text:p text:style-name="Normal">          initial={{ opacity: 0, y: 40 }}</text:p>
      <text:p text:style-name="Normal">          whileInView={{ opacity: 1, y: 0 }}</text:p>
      <text:p text:style-name="Normal">          viewport={{ once: true, margin: '-100px' }}</text:p>
      <text:p text:style-name="Normal">          transition={{ duration: 0.8 }}</text:p>
      <text:p text:style-name="Normal">          className="text-center"</text:p>
      <text:p text:style-name="Normal">        &gt;</text:p>
      <text:p text:style-name="Normal">          &lt;h2 className="text-3xl sm:text-4xl md:text-5xl font-bold text-[#FDF8F0] tracking-tight"&gt;</text:p>
      <text:p text:style-name="Normal">            {c.title}</text:p>
      <text:p text:style-name="Normal">          &lt;/h2&gt;</text:p>
      <text:p text:style-name="Normal">          &lt;div className="mt-4 w-16 h-1 bg-gradient-to-r from-[#C05621] to-[#D4A843] mx-auto rounded-full" /&gt;</text:p>
      <text:p text:style-name="Normal">        &lt;/motion.div&gt;</text:p>
      <text:p text:style-name="Normal"/>
      <text:p text:style-name="Normal">        {/* Tabs */}</text:p>
      <text:p text:style-name="Normal">        &lt;div className="mt-12 flex flex-wrap justify-center gap-2 sm:gap-3"&gt;</text:p>
      <text:p text:style-name="Normal">          {tabs.map(({ id, icon: Icon }) =&gt; (</text:p>
      <text:p text:style-name="Normal">            &lt;button</text:p>
      <text:p text:style-name="Normal">              key={id}</text:p>
      <text:p text:style-name="Normal">              onClick={() =&gt; setActive(id)}</text:p>
      <text:p text:style-name="Normal">              className={`flex items-center gap-2 px-4 sm:px-6 py-3 rounded-xl text-sm font-medium transition-all duration-300 ${</text:p>
      <text:p text:style-name="Normal">                active === id</text:p>
      <text:p text:style-name="Normal">                  ? 'bg-[#C05621] text-white shadow-lg shadow-[#C05621]/30'</text:p>
      <text:p text:style-name="Normal">                  : 'bg-white/5 text-[#FDF8F0]/60 hover:bg-white/10 hover:text-[#FDF8F0]'</text:p>
      <text:p text:style-name="Normal">              }`}</text:p>
      <text:p text:style-name="Normal">            &gt;</text:p>
      <text:p text:style-name="Normal">              &lt;Icon className="w-4 h-4" /&gt;</text:p>
      <text:p text:style-name="Normal">              {tabLabels[lang][id]}</text:p>
      <text:p text:style-name="Normal">            &lt;/button&gt;</text:p>
      <text:p text:style-name="Normal">          ))}</text:p>
      <text:p text:style-name="Normal">        &lt;/div&gt;</text:p>
      <text:p text:style-name="Normal"/>
      <text:p text:style-name="Normal">        {/* Content */}</text:p>
      <text:p text:style-name="Normal">        &lt;AnimatePresence mode="wait"&gt;</text:p>
      <text:p text:style-name="Normal">          &lt;motion.div</text:p>
      <text:p text:style-name="Normal">            key={active}</text:p>
      <text:p text:style-name="Normal">            initial={{ opacity: 0, y: 20 }}</text:p>
      <text:p text:style-name="Normal">            animate={{ opacity: 1, y: 0 }}</text:p>
      <text:soft-page-break/>
      <text:p text:style-name="Normal">            exit={{ opacity: 0, y: -20 }}</text:p>
      <text:p text:style-name="Normal">            transition={{ duration: 0.4 }}</text:p>
      <text:p text:style-name="Normal">            className="mt-10 max-w-4xl mx-auto"</text:p>
      <text:p text:style-name="Normal">          &gt;</text:p>
      <text:p text:style-name="Normal">            &lt;div className="grid gap-4"&gt;</text:p>
      <text:p text:style-name="Normal">              {c[active].map((item, i) =&gt; (</text:p>
      <text:p text:style-name="Normal">                &lt;motion.div</text:p>
      <text:p text:style-name="Normal">                  key={i}</text:p>
      <text:p text:style-name="Normal">                  initial={{ opacity: 0, x: -20 }}</text:p>
      <text:p text:style-name="Normal">                  animate={{ opacity: 1, x: 0 }}</text:p>
      <text:p text:style-name="Normal">                  transition={{ delay: i * 0.06, duration: 0.4 }}</text:p>
      <text:p text:style-name="Normal">                  className="flex gap-4 p-5 rounded-xl bg-white/5 border border-white/5 hover:bg-white/8 transition-colors"</text:p>
      <text:p text:style-name="Normal">                &gt;</text:p>
      <text:p text:style-name="Normal">                  &lt;div className="flex-shrink-0 w-8 h-8 rounded-lg bg-[#D4A843]/15 flex items-center justify-center mt-0.5"&gt;</text:p>
      <text:p text:style-name="Normal">                    &lt;span className="text-[#D4A843] text-sm font-bold"&gt;{i + 1}&lt;/span&gt;</text:p>
      <text:p text:style-name="Normal">                  &lt;/div&gt;</text:p>
      <text:p text:style-name="Normal">                  &lt;p className="text-[#FDF8F0]/75 leading-relaxed"&gt;{item}&lt;/p&gt;</text:p>
      <text:p text:style-name="Normal">                &lt;/motion.div&gt;</text:p>
      <text:p text:style-name="Normal">              ))}</text:p>
      <text:p text:style-name="Normal">            &lt;/div&gt;</text:p>
      <text:p text:style-name="Normal">          &lt;/motion.div&gt;</text:p>
      <text:p text:style-name="Normal">        &lt;/AnimatePresence&gt;</text:p>
      <text:p text:style-name="Normal">      &lt;/div&gt;</text:p>
      <text:p text:style-name="Normal">    &lt;/section&gt;</text:p>
      <text:p text:style-name="Normal">  );</text:p>
      <text:soft-page-break/>
      <text:p text:style-name="Normal">}</text:p>
      <text:p text:style-name="Normal"/>
      <text:p text:style-name="Normal"/>
      <text:p text:style-name="Normal">!------------------------------------------------------------------------------------------------------------!<text:line-break/><text:span text:style-name="T593">Code Editor - src/components/mcc/DonateSection.jsx</text:span></text:p>
      <text:p text:style-name="Normal">import React from 'react';</text:p>
      <text:p text:style-name="Normal">import { useLang } from './LanguageContext';</text:p>
      <text:p text:style-name="Normal">import { motion } from 'framer-motion';</text:p>
      <text:p text:style-name="Normal">import { Heart } from 'lucide-react';</text:p>
      <text:p text:style-name="Normal"/>
      <text:p text:style-name="Normal">const content = {</text:p>
      <text:p text:style-name="Normal">  en: {</text:p>
      <text:p text:style-name="Normal">    title: 'Donate',</text:p>
      <text:p text:style-name="Normal">    subtitle: 'Your generosity makes a difference',</text:p>
      <text:p text:style-name="Normal">    description: 'Every contribution helps us empower communities in Zavala through education, technology, and sustainable development. Together, we can create lasting change.',</text:p>
      <text:p text:style-name="Normal">    amountLabel: 'Select an amount or enter a custom value',</text:p>
      <text:p text:style-name="Normal">    customPlaceholder: 'Custom amount',</text:p>
      <text:p text:style-name="Normal">    button: 'Donate Now',</text:p>
      <text:p text:style-name="Normal">    recurring: 'Make this a monthly donation',</text:p>
      <text:p text:style-name="Normal">    note: 'All donations are tax-deductible. You will receive a receipt via email.',</text:p>
      <text:p text:style-name="Normal"> <text:s/><text:span text:style-name="T594">},</text:span></text:p>
      <text:p text:style-name="P595">  pt: {</text:p>
      <text:p text:style-name="P596">    title: 'Contribua',</text:p>
      <text:p text:style-name="P597">    subtitle: 'A sua generosidade faz a diferença',</text:p>
      <text:soft-page-break/>
      <text:p text:style-name="P598">    description: 'Cada contribuição ajuda-nos a capacitar comunidades em Zavala através da educação, tecnologia e desenvolvimento sustentável. Juntos, podemos criar uma mudança duradoura.',</text:p>
      <text:p text:style-name="P599">    amountLabel: 'Selecione um valor ou introduza um valor personalizado',</text:p>
      <text:p text:style-name="P600">    customPlaceholder: 'Valor personalizado',</text:p>
      <text:p text:style-name="P601">    button: 'Doar Agora',</text:p>
      <text:p text:style-name="P602">    recurring: 'Tornar este um donativo mensal',</text:p>
      <text:p text:style-name="P603">    note: 'Todos os donativos são dedutíveis nos impostos. Receberá um recibo por e-mail.',</text:p>
      <text:p text:style-name="Normal"><text:span text:style-name="T604"> <text:s/></text:span>},</text:p>
      <text:p text:style-name="Normal">};</text:p>
      <text:p text:style-name="Normal"/>
      <text:p text:style-name="Normal">const amounts = [10, 25, 50, 100, 250, 500];</text:p>
      <text:p text:style-name="Normal"/>
      <text:p text:style-name="Normal">export default function DonateSection() {</text:p>
      <text:p text:style-name="Normal">  const { lang } = useLang();</text:p>
      <text:p text:style-name="Normal">  const c = content[lang];</text:p>
      <text:p text:style-name="Normal">  const [selected, setSelected] = React.useState(null);</text:p>
      <text:p text:style-name="Normal"/>
      <text:p text:style-name="Normal">  return (</text:p>
      <text:p text:style-name="Normal">    &lt;section id="donate" className="py-24 sm:py-32 bg-gradient-to-br from-[#FDF8F0] to-[#F5EDE0]"&gt;</text:p>
      <text:p text:style-name="Normal">      &lt;div className="max-w-4xl mx-auto px-6"&gt;</text:p>
      <text:p text:style-name="Normal">        &lt;motion.div</text:p>
      <text:p text:style-name="Normal">          initial={{ opacity: 0, y: 40 }}</text:p>
      <text:p text:style-name="Normal">          whileInView={{ opacity: 1, y: 0 }}</text:p>
      <text:p text:style-name="Normal">          viewport={{ once: true, margin: '-100px' }}</text:p>
      <text:p text:style-name="Normal">          transition={{ duration: 0.8 }}</text:p>
      <text:soft-page-break/>
      <text:p text:style-name="Normal">          className="text-center"</text:p>
      <text:p text:style-name="Normal">        &gt;</text:p>
      <text:p text:style-name="Normal">          &lt;div className="inline-flex items-center justify-center w-14 h-14 rounded-2xl bg-[#C05621]/10 mb-6"&gt;</text:p>
      <text:p text:style-name="Normal">            &lt;Heart className="w-7 h-7 text-[#C05621]" /&gt;</text:p>
      <text:p text:style-name="Normal">          &lt;/div&gt;</text:p>
      <text:p text:style-name="Normal">          &lt;h2 className="text-3xl sm:text-4xl md:text-5xl font-bold text-[#1A1A2E] tracking-tight"&gt;</text:p>
      <text:p text:style-name="Normal">            {c.title}</text:p>
      <text:p text:style-name="Normal">          &lt;/h2&gt;</text:p>
      <text:p text:style-name="Normal">          &lt;p className="mt-3 text-[#D4A843] font-medium text-lg"&gt;{c.subtitle}&lt;/p&gt;</text:p>
      <text:p text:style-name="Normal">          &lt;div className="mt-4 w-16 h-1 bg-gradient-to-r from-[#C05621] to-[#D4A843] mx-auto rounded-full" /&gt;</text:p>
      <text:p text:style-name="Normal">          &lt;p className="mt-6 text-[#1A1A2E]/70 max-w-2xl mx-auto leading-relaxed"&gt;</text:p>
      <text:p text:style-name="Normal">            {c.description}</text:p>
      <text:p text:style-name="Normal">          &lt;/p&gt;</text:p>
      <text:p text:style-name="Normal">        &lt;/motion.div&gt;</text:p>
      <text:p text:style-name="Normal"/>
      <text:p text:style-name="Normal">        &lt;motion.div</text:p>
      <text:p text:style-name="Normal">          initial={{ opacity: 0, y: 30 }}</text:p>
      <text:p text:style-name="Normal">          whileInView={{ opacity: 1, y: 0 }}</text:p>
      <text:p text:style-name="Normal">          viewport={{ once: true }}</text:p>
      <text:p text:style-name="Normal">          transition={{ duration: 0.8, delay: 0.2 }}</text:p>
      <text:p text:style-name="Normal">          className="mt-12 bg-white rounded-2xl shadow-xl p-8 sm:p-10 border border-[#1A1A2E]/5"</text:p>
      <text:p text:style-name="Normal">        &gt;</text:p>
      <text:p text:style-name="Normal">          &lt;p className="text-sm font-medium text-[#1A1A2E]/60 mb-4"&gt;{c.amountLabel}&lt;/p&gt;</text:p>
      <text:p text:style-name="Normal">          &lt;div className="grid grid-cols-3 sm:grid-cols-6 gap-3 mb-6"&gt;</text:p>
      <text:soft-page-break/>
      <text:p text:style-name="Normal">            {amounts.map((amount) =&gt; (</text:p>
      <text:p text:style-name="Normal">              &lt;button</text:p>
      <text:p text:style-name="Normal">                key={amount}</text:p>
      <text:p text:style-name="Normal">                onClick={() =&gt; setSelected(amount)}</text:p>
      <text:p text:style-name="Normal">                className={`py-3 rounded-xl text-sm font-semibold transition-all duration-300 border ${</text:p>
      <text:p text:style-name="Normal">                  selected === amount</text:p>
      <text:p text:style-name="Normal">                    ? 'bg-[#C05621] text-white border-[#C05621] shadow-lg shadow-[#C05621]/20'</text:p>
      <text:p text:style-name="Normal">                    : 'bg-white text-[#1A1A2E] border-[#1A1A2E]/10 hover:border-[#C05621]/40 hover:text-[#C05621]'</text:p>
      <text:p text:style-name="Normal">                }`}</text:p>
      <text:p text:style-name="Normal">              &gt;</text:p>
      <text:p text:style-name="Normal">                ${amount}</text:p>
      <text:p text:style-name="Normal">              &lt;/button&gt;</text:p>
      <text:p text:style-name="Normal">            ))}</text:p>
      <text:p text:style-name="Normal">          &lt;/div&gt;</text:p>
      <text:p text:style-name="Normal">          &lt;input</text:p>
      <text:p text:style-name="Normal">            type="text"</text:p>
      <text:p text:style-name="Normal">            placeholder={c.customPlaceholder}</text:p>
      <text:p text:style-name="Normal">            className="w-full px-5 py-3.5 rounded-xl border border-[#1A1A2E]/10 focus:outline-none focus:border-[#C05621] focus:ring-2 focus:ring-[#C05621]/20 transition-all text-[#1A1A2E] placeholder:text-[#1A1A2E]/30"</text:p>
      <text:p text:style-name="Normal">            onFocus={() =&gt; setSelected(null)}</text:p>
      <text:p text:style-name="Normal">          /&gt;</text:p>
      <text:p text:style-name="Normal">          &lt;label className="flex items-center gap-3 mt-5 cursor-pointer"&gt;</text:p>
      <text:p text:style-name="Normal">            &lt;input type="checkbox" className="w-4 h-4 rounded border-[#1A1A2E]/20 text-[#C05621] focus:ring-[#C05621]" /&gt;</text:p>
      <text:soft-page-break/>
      <text:p text:style-name="Normal">            &lt;span className="text-sm text-[#1A1A2E]/60"&gt;{c.recurring}&lt;/span&gt;</text:p>
      <text:p text:style-name="Normal">          &lt;/label&gt;</text:p>
      <text:p text:style-name="Normal">          &lt;button className="mt-6 w-full py-4 bg-[#C05621] hover:bg-[#A04A1C] text-white font-semibold rounded-xl transition-all duration-300 shadow-lg shadow-[#C05621]/30 hover:shadow-xl hover:shadow-[#C05621]/40 flex items-center justify-center gap-2"&gt;</text:p>
      <text:p text:style-name="Normal">            &lt;Heart className="w-5 h-5" /&gt;</text:p>
      <text:p text:style-name="Normal">            {c.button}</text:p>
      <text:p text:style-name="Normal">          &lt;/button&gt;</text:p>
      <text:p text:style-name="Normal">          &lt;p className="mt-4 text-xs text-center text-[#1A1A2E]/40"&gt;{c.note}&lt;/p&gt;</text:p>
      <text:p text:style-name="Normal">        &lt;/motion.div&gt;</text:p>
      <text:p text:style-name="Normal">      &lt;/div&gt;</text:p>
      <text:p text:style-name="Normal">    &lt;/section&gt;</text:p>
      <text:p text:style-name="Normal">  );</text:p>
      <text:p text:style-name="Normal">}</text:p>
      <text:p text:style-name="Normal"><text:line-break/>!--------------------------------------------------------------------------------------------------!<text:line-break/><text:line-break/><text:line-break/><text:span text:style-name="T605">Code Editor - src/components/mcc/MediaSection.jsx</text:span><text:line-break/><text:line-break/>import React from 'react';</text:p>
      <text:p text:style-name="Normal">import { useLang } from './LanguageContext';</text:p>
      <text:p text:style-name="Normal">import { motion } from 'framer-motion';</text:p>
      <text:p text:style-name="Normal">import { Play, Image, Newspaper } from 'lucide-react';</text:p>
      <text:p text:style-name="Normal"/>
      <text:p text:style-name="Normal">const content = {</text:p>
      <text:p text:style-name="Normal">  en: {</text:p>
      <text:p text:style-name="Normal">    title: 'Media',</text:p>
      <text:soft-page-break/>
      <text:p text:style-name="Normal">    subtitle: 'Stories, updates, and highlights from our community',</text:p>
      <text:p text:style-name="Normal">    news: 'Latest News',</text:p>
      <text:p text:style-name="Normal">    gallery: 'Photo Gallery',</text:p>
      <text:p text:style-name="Normal">    videos: 'Videos',</text:p>
      <text:p text:style-name="Normal">    comingSoon: 'Coming Soon',</text:p>
      <text:p text:style-name="Normal">    comingDesc: 'We are preparing exciting content to share with you. Stay tuned for updates about our projects and community events.',</text:p>
      <text:p text:style-name="Normal">    followUs: 'Follow Us',</text:p>
      <text:p text:style-name="Normal">  },</text:p>
      <text:p text:style-name="Normal">  pt: {</text:p>
      <text:p text:style-name="Normal">    title: 'Redes Sociais',</text:p>
      <text:p text:style-name="Normal">   <text:s/><text:span text:style-name="T606">subtitle: 'Histórias, atualizações e destaques da nossa comunidade',</text:span></text:p>
      <text:p text:style-name="P607">    news: 'Últimas Notícias',</text:p>
      <text:p text:style-name="P608">    gallery: 'Galeria de Fotos',</text:p>
      <text:p text:style-name="P609">    videos: 'Vídeos',</text:p>
      <text:p text:style-name="P610">    comingSoon: 'Em Breve',</text:p>
      <text:p text:style-name="P611">    comingDesc: 'Estamos a preparar conteúdos entusiasmantes para partilhar consigo. Fique atento às atualizações sobre os nossos projetos e eventos comunitários.',</text:p>
      <text:p text:style-name="Normal"><text:span text:style-name="T612">   <text:s/></text:span>followUs: 'Siga-nos',</text:p>
      <text:p text:style-name="Normal">  },</text:p>
      <text:p text:style-name="Normal">};</text:p>
      <text:p text:style-name="Normal"/>
      <text:p text:style-name="Normal">const socialLinks = [</text:p>
      <text:p text:style-name="Normal">  { name: 'X (Twitter)', icon: () =&gt; (</text:p>
      <text:p text:style-name="Normal">   <text:s/><text:span text:style-name="T613">&lt;svg viewBox="0 0 24 24" className="w-5 h-5 fill-current"&gt;&lt;path d="M18.244 2.25h3.308l-7.227 8.26 8.502 11.24H16.17l-5.214-6.817L4.99 21.75H1.68l7.73-8.835L1.254 2.25H8.08l4.713 6.231zm-1.161 17.52h1.833L7.084 4.126H5.117z"/&gt;&lt;/svg&gt;</text:span></text:p>
      <text:soft-page-break/>
      <text:p text:style-name="Normal"><text:span text:style-name="T614"> <text:s/></text:span>), href: '#' },</text:p>
      <text:p text:style-name="Normal">  { name: 'LinkedIn', icon: () =&gt; (</text:p>
      <text:p text:style-name="Normal">   <text:s/><text:span text:style-name="T615">&lt;svg viewBox="0 0 24 24" className="w-5 h-5 fill-current"&gt;&lt;path d="M20.447 20.452h-3.554v-5.569c0-1.328-.027-3.037-1.852-3.037-1.853 0-2.136 1.445-2.136 2.939v5.667H9.351V9h3.414v1.561h.046c.477-.9 1.637-1.85 3.37-1.85 3.601 0 4.267 2.37 4.267 5.455v6.286zM5.337 7.433c-1.144 0-2.063-.926-2.063-2.065 0-1.138.92-2.063 2.063-2.063 1.14 0 2.064.925 2.064 2.063 0 1.139-.925 2.065-2.064 2.065zm1.782 13.019H3.555V9h3.564v11.452zM22.225 0H1.771C.792 0 0 .774 0 1.729v20.542C0 23.227.792 24 1.771 24h20.451C23.2 24 24 23.227 24 22.271V1.729C24 .774 23.2 0 22.222 0h.003z"/&gt;&lt;/svg&gt;</text:span></text:p>
      <text:p text:style-name="Normal"><text:span text:style-name="T616"> <text:s/></text:span>), href: '#' },</text:p>
      <text:p text:style-name="Normal">  { name: 'Instagram', icon: () =&gt; (</text:p>
      <text:p text:style-name="Normal">    &lt;svg viewBox="0 0 24 24" className="w-5 h-5 fill-current"&gt;&lt;path d="M12 0C8.74 0 8.333.015 7.053.072 5.775.132 4.905.333 4.14.63c-.789.306-1.459.717-2.126 1.384S.935 3.35.63 4.14C.333 4.905.131 5.775.072 7.053.012 8.333 0 8.74 0 12s.015 3.667.072 4.947c.06 1.277.261 2.148.558 2.913.306.788.717 1.459 1.384 2.126.667.666 1.336 1.079 2.126 1.384.766.296 1.636.499 2.913.558C8.333 23.988 8.74 24 12 24s3.667-.015 4.947-.072c1.277-.06 2.148-.262 2.913-.558.788-.306 1.459-.718 2.126-1.384.666-.667 1.079-1.335 1.384-2.126.296-.765.499-1.636.558-2.913.06-1.28.072-1.687.072-4.947s-.015-3.667-.072-4.947c-.06-1.277-.262-2.149-.558-2.913-.306-.789-.718-1.459-1.384-2.126C21.319 1.347 20.651.935 19.86.63c-.765-.297-1.636-.499-2.913-.558C15.667.012 15.26 0 12 0zm0 2.16c3.203 0 3.585.016 4.85.071 1.17.055 1.805.249 2.227.415.562.217.96.477 1.382.896.419.42.679.819.896 1.381.164.422.36 1.057.413 2.227.057 1.266.07 1.646.07 4.85s-.015 3.585-.074 4.85c-.061 1.17-.256 1.805-.421 2.227-.224.562-.479.96-.899 1.382-.419.419-.824.679-1.38.896-.42.164-1.065.36-2.235.413-1.274.057-1.649.07-4.859.07-3.211 0-3.586-.015-4.859-.074-1.171-.061-1.816-.256-2.236-.421-.569-.224-.96-.479-1.379-.899-.421-.419-.69-.824-.9-1.38-.165-.42-.359-1.065-.42-2.235-.045-1.26-.061-1.649-.061-4.844 0-3.196.016-3.586.061-4.861.061-1.17.255-1.814.42-2.234.21-.57.479-.96.9-1.381.419-.419.81-.689 1.379-.898.42-.166 1.051-.361 2.221-.421 1.275-.045 1.65-.06 4.859-.06l.045.03zm0 3.678c-3.405 0-6.162 2.76-6.162 6.162 0 3.405 2.76 6.162 6.162 6.162 3.405 0 6.162-2.76 6.162-6.162 0-3.405-2.76-6.162-6.162-6.162zM12 16c-2.21 0-4-1.79-4-4s1.79-4 4-4 4 1.79 4 4-1.79 4-4 4zm7.846-10.405c0 .795-.646 1.44-1.44 1.44-.795 0-1.44-.646-1.44-1.44 0-.794.646-1.439 1.44-1.439.793-.001 1.44.645 1.44 1.439z"/&gt;&lt;/svg&gt;</text:p>
      <text:p text:style-name="Normal">  ), href: '#' },</text:p>
      <text:p text:style-name="Normal">  { name: 'TikTok', icon: () =&gt; (</text:p>
      <text:soft-page-break/>
      <text:p text:style-name="Normal">    &lt;svg viewBox="0 0 24 24" className="w-5 h-5 fill-current"&gt;&lt;path d="M12.525.02c1.31-.02 2.61-.01 3.91-.02.08 1.53.63 3.09 1.75 4.17 1.12 1.11 2.7 1.62 4.24 1.79v4.03c-1.44-.05-2.89-.35-4.2-.97-.57-.26-1.1-.59-1.62-.93-.01 2.92.01 5.84-.02 8.75-.08 1.4-.54 2.79-1.35 3.94-1.31 1.92-3.58 3.17-5.91 3.21-1.43.08-2.86-.31-4.08-1.03-2.02-1.19-3.44-3.37-3.65-5.71-.02-.5-.03-1-.01-1.49.18-1.9 1.12-3.72 2.58-4.96 1.66-1.44 3.98-2.13 6.15-1.72.02 1.48-.04 2.96-.04 4.44-.99-.32-2.15-.23-3.02.37-.63.41-1.11 1.04-1.36 1.75-.21.51-.15 1.07-.14 1.61.24 1.64 1.82 3.02 3.5 2.87 1.12-.01 2.19-.66 2.77-1.61.19-.33.4-.67.41-1.06.1-1.79.06-3.57.07-5.36.01-4.03-.01-8.05.02-12.07z"/&gt;&lt;/svg&gt;</text:p>
      <text:p text:style-name="Normal">  ), href: '#' },</text:p>
      <text:p text:style-name="Normal">  { name: 'Email', icon: () =&gt; (</text:p>
      <text:p text:style-name="Normal">    &lt;svg viewBox="0 0 24 24" className="w-5 h-5 fill-current"&gt;&lt;path d="M20 4H4c-1.1 0-1.99.9-1.99 2L2 18c0 1.1.9 2 2 2h16c1.1 0 2-.9 2-2V6c0-1.1-.9-2-2-2zm0 4l-8 5-8-5V6l8 5 8-5v2z"/&gt;&lt;/svg&gt;</text:p>
      <text:p text:style-name="Normal">  ), href: 'mailto:info@malalanecc.org' },</text:p>
      <text:p text:style-name="Normal">];</text:p>
      <text:p text:style-name="Normal"/>
      <text:p text:style-name="Normal">const placeholderCards = [</text:p>
      <text:p text:style-name="Normal">  { icon: Newspaper, key: 'news' },</text:p>
      <text:p text:style-name="Normal">  { icon: Image, key: 'gallery' },</text:p>
      <text:p text:style-name="Normal">  { icon: Play, key: 'videos' },</text:p>
      <text:p text:style-name="Normal">];</text:p>
      <text:p text:style-name="Normal"/>
      <text:p text:style-name="Normal">export default function MediaSection() {</text:p>
      <text:p text:style-name="Normal">  const { lang } = useLang();</text:p>
      <text:p text:style-name="Normal">  const c = content[lang];</text:p>
      <text:p text:style-name="Normal"/>
      <text:p text:style-name="Normal">  return (</text:p>
      <text:p text:style-name="Normal">    &lt;section id="media" className="py-24 sm:py-32 bg-[#FDF8F0]"&gt;</text:p>
      <text:p text:style-name="Normal">      &lt;div className="max-w-6xl mx-auto px-6"&gt;</text:p>
      <text:soft-page-break/>
      <text:p text:style-name="Normal">        &lt;motion.div</text:p>
      <text:p text:style-name="Normal">          initial={{ opacity: 0, y: 40 }}</text:p>
      <text:p text:style-name="Normal">          whileInView={{ opacity: 1, y: 0 }}</text:p>
      <text:p text:style-name="Normal">          viewport={{ once: true, margin: '-100px' }}</text:p>
      <text:p text:style-name="Normal">          transition={{ duration: 0.8 }}</text:p>
      <text:p text:style-name="Normal">          className="text-center"</text:p>
      <text:p text:style-name="Normal">        &gt;</text:p>
      <text:p text:style-name="Normal">          &lt;h2 className="text-3xl sm:text-4xl md:text-5xl font-bold text-[#1A1A2E] tracking-tight"&gt;</text:p>
      <text:p text:style-name="Normal">            {c.title}</text:p>
      <text:p text:style-name="Normal">          &lt;/h2&gt;</text:p>
      <text:p text:style-name="Normal">          &lt;p className="mt-3 text-[#1A1A2E]/50 text-lg"&gt;{c.subtitle}&lt;/p&gt;</text:p>
      <text:p text:style-name="Normal">          &lt;div className="mt-4 w-16 h-1 bg-gradient-to-r from-[#C05621] to-[#D4A843] mx-auto rounded-full" /&gt;</text:p>
      <text:p text:style-name="Normal">        &lt;/motion.div&gt;</text:p>
      <text:p text:style-name="Normal"/>
      <text:p text:style-name="Normal">        {/* Placeholder cards */}</text:p>
      <text:p text:style-name="Normal">        &lt;div className="mt-14 grid sm:grid-cols-3 gap-6"&gt;</text:p>
      <text:p text:style-name="Normal">          {placeholderCards.map(({ icon: Icon, key }, i) =&gt; (</text:p>
      <text:p text:style-name="Normal">            &lt;motion.div</text:p>
      <text:p text:style-name="Normal">              key={key}</text:p>
      <text:p text:style-name="Normal">              initial={{ opacity: 0, y: 30 }}</text:p>
      <text:p text:style-name="Normal">              whileInView={{ opacity: 1, y: 0 }}</text:p>
      <text:p text:style-name="Normal">              viewport={{ once: true }}</text:p>
      <text:p text:style-name="Normal">              transition={{ duration: 0.6, delay: i * 0.1 }}</text:p>
      <text:p text:style-name="Normal">              className="bg-white rounded-2xl p-8 text-center border border-[#1A1A2E]/5 shadow-sm hover:shadow-md transition-shadow"</text:p>
      <text:p text:style-name="Normal">            &gt;</text:p>
      <text:soft-page-break/>
      <text:p text:style-name="Normal">              &lt;div className="inline-flex items-center justify-center w-16 h-16 rounded-2xl bg-[#1A1A2E]/5 mb-5"&gt;</text:p>
      <text:p text:style-name="Normal">                &lt;Icon className="w-8 h-8 text-[#1A1A2E]/30" /&gt;</text:p>
      <text:p text:style-name="Normal">              &lt;/div&gt;</text:p>
      <text:p text:style-name="Normal">              &lt;h3 className="text-lg font-semibold text-[#1A1A2E]"&gt;{c[key]}&lt;/h3&gt;</text:p>
      <text:p text:style-name="Normal">              &lt;p className="mt-2 text-sm text-[#1A1A2E]/40"&gt;{c.comingSoon}&lt;/p&gt;</text:p>
      <text:p text:style-name="Normal">            &lt;/motion.div&gt;</text:p>
      <text:p text:style-name="Normal">          ))}</text:p>
      <text:p text:style-name="Normal">        &lt;/div&gt;</text:p>
      <text:p text:style-name="Normal"/>
      <text:p text:style-name="Normal">        &lt;p className="mt-8 text-center text-[#1A1A2E]/50 max-w-xl mx-auto"&gt;{c.comingDesc}&lt;/p&gt;</text:p>
      <text:p text:style-name="Normal"/>
      <text:p text:style-name="Normal">        {/* Social Links */}</text:p>
      <text:p text:style-name="Normal">        &lt;motion.div</text:p>
      <text:p text:style-name="Normal">          initial={{ opacity: 0, y: 20 }}</text:p>
      <text:p text:style-name="Normal">          whileInView={{ opacity: 1, y: 0 }}</text:p>
      <text:p text:style-name="Normal">          viewport={{ once: true }}</text:p>
      <text:p text:style-name="Normal">          transition={{ duration: 0.6, delay: 0.3 }}</text:p>
      <text:p text:style-name="Normal">          className="mt-14 text-center"</text:p>
      <text:p text:style-name="Normal">        &gt;</text:p>
      <text:p text:style-name="Normal">          &lt;p className="text-sm font-semibold uppercase tracking-wider text-[#1A1A2E]/40 mb-6"&gt;{c.followUs}&lt;/p&gt;</text:p>
      <text:p text:style-name="Normal">          &lt;div className="flex justify-center gap-4"&gt;</text:p>
      <text:p text:style-name="Normal">            {socialLinks.map((social) =&gt; (</text:p>
      <text:p text:style-name="Normal">              &lt;a</text:p>
      <text:p text:style-name="Normal">                key={social.name}</text:p>
      <text:soft-page-break/>
      <text:p text:style-name="Normal">                href={social.href}</text:p>
      <text:p text:style-name="Normal">                target="_blank"</text:p>
      <text:p text:style-name="Normal">                rel="noopener noreferrer"</text:p>
      <text:p text:style-name="Normal">                className="w-12 h-12 rounded-xl bg-[#1A1A2E] text-white flex items-center justify-center hover:bg-[#C05621] transition-colors duration-300 hover:scale-110 transform"</text:p>
      <text:p text:style-name="Normal">                title={social.name}</text:p>
      <text:p text:style-name="Normal">              &gt;</text:p>
      <text:p text:style-name="Normal">                &lt;social.icon /&gt;</text:p>
      <text:p text:style-name="Normal">              &lt;/a&gt;</text:p>
      <text:p text:style-name="Normal">            ))}</text:p>
      <text:p text:style-name="Normal">          &lt;/div&gt;</text:p>
      <text:p text:style-name="Normal">        &lt;/motion.div&gt;</text:p>
      <text:p text:style-name="Normal">      &lt;/div&gt;</text:p>
      <text:p text:style-name="Normal">    &lt;/section&gt;</text:p>
      <text:p text:style-name="Normal">  );</text:p>
      <text:p text:style-name="Normal">}</text:p>
      <text:p text:style-name="Normal">!--------------------------------------------------------------------------------------------------------!<text:line-break/><text:span text:style-name="T617">Code Editor - src/components/mcc/GetInvolved.jsx</text:span><text:line-break/>import React from 'react';</text:p>
      <text:p text:style-name="Normal">import { useLang } from './LanguageContext';</text:p>
      <text:p text:style-name="Normal">import { motion } from 'framer-motion';</text:p>
      <text:p text:style-name="Normal">import { HandHeart, Users, Megaphone, Briefcase } from 'lucide-react';</text:p>
      <text:p text:style-name="Normal"/>
      <text:p text:style-name="Normal">const content = {</text:p>
      <text:p text:style-name="Normal">  en: {</text:p>
      <text:p text:style-name="Normal">    title: 'Get Involved',</text:p>
      <text:p text:style-name="Normal">    subtitle: 'Join us in making a difference',</text:p>
      <text:soft-page-break/>
      <text:p text:style-name="Normal">    description: 'There are many ways to support our mission. Whether you volunteer your time, partner with us, or help spread the word — every action counts.',</text:p>
      <text:p text:style-name="Normal">    cards: [</text:p>
      <text:p text:style-name="Normal">      { icon: HandHeart, title: 'Volunteer', desc: 'Give your time and skills to help our community programs and events.' },</text:p>
      <text:p text:style-name="Normal">      { icon: Briefcase, title: 'Partner With Us', desc: 'Collaborate with MCC as a corporate or institutional partner to amplify our impact.' },</text:p>
      <text:p text:style-name="Normal">      { icon: Megaphone, title: 'Spread the Word', desc: 'Share our mission on social media and help us reach more people.' },</text:p>
      <text:p text:style-name="Normal">      { icon: Users, title: 'Join Our Team', desc: 'We are always looking for passionate individuals to join our team.' },</text:p>
      <text:p text:style-name="Normal">    ],</text:p>
      <text:p text:style-name="Normal">    formTitle: 'Stay Connected',</text:p>
      <text:p text:style-name="Normal">    namePlaceholder: 'Your Name',</text:p>
      <text:p text:style-name="Normal">    emailPlaceholder: 'Your Email',</text:p>
      <text:p text:style-name="Normal">    messagePlaceholder: 'How would you like to get involved?',</text:p>
      <text:p text:style-name="Normal">    button: 'Send Message',</text:p>
      <text:p text:style-name="Normal">  },</text:p>
      <text:p text:style-name="Normal">  pt: {</text:p>
      <text:p text:style-name="Normal">    title: 'Como Participar',</text:p>
      <text:p text:style-name="Normal">   <text:s/><text:span text:style-name="T618">subtitle: 'Junte-se a nós para fazer a diferença',</text:span></text:p>
      <text:p text:style-name="P619">    description: 'Existem muitas formas de apoiar a nossa missão. Quer seja como voluntário, parceiro ou ajudando a divulgar — cada ação conta.',</text:p>
      <text:p text:style-name="P620">    cards: [</text:p>
      <text:p text:style-name="P621">      { icon: HandHeart, title: 'Voluntariado', desc: 'Dedique o seu tempo e competências para ajudar os nossos programas comunitários e eventos.' },</text:p>
      <text:p text:style-name="P622">      { icon: Briefcase, title: 'Parcerias', desc: 'Colabore com o MCC como parceiro corporativo ou institucional para ampliar o nosso impacto.' },</text:p>
      <text:soft-page-break/>
      <text:p text:style-name="P623">      { icon: Megaphone, title: 'Divulgue', desc: 'Partilhe a nossa missão nas redes sociais e ajude-nos a alcançar mais pessoas.' },</text:p>
      <text:p text:style-name="P624">      { icon: Users, title: 'Junte-se à Equipa', desc: 'Estamos sempre à procura de pessoas apaixonadas para se juntarem à nossa equipa.' },</text:p>
      <text:p text:style-name="P625">    ],</text:p>
      <text:p text:style-name="P626">    formTitle: 'Mantenha-se Ligado',</text:p>
      <text:p text:style-name="P627">    namePlaceholder: 'O Seu Nome',</text:p>
      <text:p text:style-name="P628">    emailPlaceholder: 'O Seu E-mail',</text:p>
      <text:p text:style-name="P629">    messagePlaceholder: 'Como gostaria de participar?',</text:p>
      <text:p text:style-name="Normal"><text:span text:style-name="T630">   <text:s/></text:span>button: 'Enviar Mensagem',</text:p>
      <text:p text:style-name="Normal">  },</text:p>
      <text:p text:style-name="Normal">};</text:p>
      <text:p text:style-name="Normal"/>
      <text:p text:style-name="Normal">export default function GetInvolved() {</text:p>
      <text:p text:style-name="Normal">  const { lang } = useLang();</text:p>
      <text:p text:style-name="Normal">  const c = content[lang];</text:p>
      <text:p text:style-name="Normal"/>
      <text:p text:style-name="Normal">  return (</text:p>
      <text:p text:style-name="Normal">    &lt;section id="get-involved" className="py-24 sm:py-32 bg-[#1A1A2E] relative overflow-hidden"&gt;</text:p>
      <text:p text:style-name="Normal">      &lt;div className="absolute top-0 left-0 w-full h-1 bg-gradient-to-r from-[#C05621] via-[#D4A843] to-[#2D6A4F]" /&gt;</text:p>
      <text:p text:style-name="Normal"/>
      <text:p text:style-name="Normal">      &lt;div className="max-w-6xl mx-auto px-6 relative z-10"&gt;</text:p>
      <text:p text:style-name="Normal">        &lt;motion.div</text:p>
      <text:p text:style-name="Normal">          initial={{ opacity: 0, y: 40 }}</text:p>
      <text:p text:style-name="Normal">          whileInView={{ opacity: 1, y: 0 }}</text:p>
      <text:soft-page-break/>
      <text:p text:style-name="Normal">          viewport={{ once: true, margin: '-100px' }}</text:p>
      <text:p text:style-name="Normal">          transition={{ duration: 0.8 }}</text:p>
      <text:p text:style-name="Normal">          className="text-center"</text:p>
      <text:p text:style-name="Normal">        &gt;</text:p>
      <text:p text:style-name="Normal">          &lt;h2 className="text-3xl sm:text-4xl md:text-5xl font-bold text-[#FDF8F0] tracking-tight"&gt;</text:p>
      <text:p text:style-name="Normal">            {c.title}</text:p>
      <text:p text:style-name="Normal">          &lt;/h2&gt;</text:p>
      <text:p text:style-name="Normal">          &lt;p className="mt-3 text-[#D4A843] font-medium text-lg"&gt;{c.subtitle}&lt;/p&gt;</text:p>
      <text:p text:style-name="Normal">          &lt;div className="mt-4 w-16 h-1 bg-gradient-to-r from-[#C05621] to-[#D4A843] mx-auto rounded-full" /&gt;</text:p>
      <text:p text:style-name="Normal">          &lt;p className="mt-6 text-[#FDF8F0]/60 max-w-2xl mx-auto"&gt;{c.description}&lt;/p&gt;</text:p>
      <text:p text:style-name="Normal">        &lt;/motion.div&gt;</text:p>
      <text:p text:style-name="Normal"/>
      <text:p text:style-name="Normal">        {/* Cards */}</text:p>
      <text:p text:style-name="Normal">        &lt;div className="mt-14 grid sm:grid-cols-2 lg:grid-cols-4 gap-5"&gt;</text:p>
      <text:p text:style-name="Normal">          {c.cards.map(({ icon: Icon, title, desc }, i) =&gt; (</text:p>
      <text:p text:style-name="Normal">            &lt;motion.div</text:p>
      <text:p text:style-name="Normal">              key={i}</text:p>
      <text:p text:style-name="Normal">              initial={{ opacity: 0, y: 30 }}</text:p>
      <text:p text:style-name="Normal">              whileInView={{ opacity: 1, y: 0 }}</text:p>
      <text:p text:style-name="Normal">              viewport={{ once: true }}</text:p>
      <text:p text:style-name="Normal">              transition={{ duration: 0.5, delay: i * 0.1 }}</text:p>
      <text:p text:style-name="Normal">              className="bg-white/5 border border-white/5 rounded-2xl p-6 hover:bg-white/10 transition-all duration-300 group"</text:p>
      <text:p text:style-name="Normal">            &gt;</text:p>
      <text:p text:style-name="Normal">              &lt;div className="w-12 h-12 rounded-xl bg-[#C05621]/15 flex items-center justify-center mb-4 group-hover:bg-[#C05621]/25 transition-colors"&gt;</text:p>
      <text:soft-page-break/>
      <text:p text:style-name="Normal">                &lt;Icon className="w-6 h-6 text-[#C05621]" /&gt;</text:p>
      <text:p text:style-name="Normal">              &lt;/div&gt;</text:p>
      <text:p text:style-name="Normal">              &lt;h3 className="text-lg font-semibold text-[#FDF8F0]"&gt;{title}&lt;/h3&gt;</text:p>
      <text:p text:style-name="Normal">              &lt;p className="mt-2 text-sm text-[#FDF8F0]/50 leading-relaxed"&gt;{desc}&lt;/p&gt;</text:p>
      <text:p text:style-name="Normal">            &lt;/motion.div&gt;</text:p>
      <text:p text:style-name="Normal">          ))}</text:p>
      <text:p text:style-name="Normal">        &lt;/div&gt;</text:p>
      <text:p text:style-name="Normal"/>
      <text:p text:style-name="Normal">        {/* Contact Form */}</text:p>
      <text:p text:style-name="Normal">        &lt;motion.div</text:p>
      <text:p text:style-name="Normal">          initial={{ opacity: 0, y: 30 }}</text:p>
      <text:p text:style-name="Normal">          whileInView={{ opacity: 1, y: 0 }}</text:p>
      <text:p text:style-name="Normal">          viewport={{ once: true }}</text:p>
      <text:p text:style-name="Normal">          transition={{ duration: 0.8, delay: 0.2 }}</text:p>
      <text:p text:style-name="Normal">          className="mt-16 max-w-xl mx-auto"</text:p>
      <text:p text:style-name="Normal">        &gt;</text:p>
      <text:p text:style-name="Normal">          &lt;h3 className="text-2xl font-bold text-[#FDF8F0] text-center mb-8"&gt;{c.formTitle}&lt;/h3&gt;</text:p>
      <text:p text:style-name="Normal">          &lt;div className="space-y-4"&gt;</text:p>
      <text:p text:style-name="Normal">            &lt;input</text:p>
      <text:p text:style-name="Normal">              type="text"</text:p>
      <text:p text:style-name="Normal">              placeholder={c.namePlaceholder}</text:p>
      <text:p text:style-name="Normal">              className="w-full px-5 py-3.5 rounded-xl bg-white/5 border border-white/10 text-[#FDF8F0] placeholder:text-white focus:outline-none focus:border-[#C05621] focus:ring-2 focus:ring-[#C05621]/20 transition-all"</text:p>
      <text:p text:style-name="Normal">            /&gt;</text:p>
      <text:p text:style-name="Normal">            &lt;input</text:p>
      <text:p text:style-name="Normal">              type="email"</text:p>
      <text:soft-page-break/>
      <text:p text:style-name="Normal">              placeholder={c.emailPlaceholder}</text:p>
      <text:p text:style-name="Normal">              className="w-full px-5 py-3.5 rounded-xl bg-white/5 border border-white/10 text-[#FDF8F0] placeholder:text-white focus:outline-none focus:border-[#C05621] focus:ring-2 focus:ring-[#C05621]/20 transition-all"</text:p>
      <text:p text:style-name="Normal">            /&gt;</text:p>
      <text:p text:style-name="Normal">            &lt;textarea</text:p>
      <text:p text:style-name="Normal">              placeholder={c.messagePlaceholder}</text:p>
      <text:p text:style-name="Normal">              rows={4}</text:p>
      <text:p text:style-name="Normal">              className="w-full px-5 py-3.5 rounded-xl bg-white/5 border border-white/10 text-[#FDF8F0] placeholder:text-white focus:outline-none focus:border-[#C05621] focus:ring-2 focus:ring-[#C05621]/20 transition-all resize-none"</text:p>
      <text:p text:style-name="Normal">            /&gt;</text:p>
      <text:p text:style-name="Normal">            &lt;button className="w-full py-4 bg-[#C05621] hover:bg-[#A04A1C] text-white font-semibold rounded-xl transition-all duration-300 shadow-lg shadow-[#C05621]/30 hover:shadow-xl"&gt;</text:p>
      <text:p text:style-name="Normal">              {c.button}</text:p>
      <text:p text:style-name="Normal">            &lt;/button&gt;</text:p>
      <text:p text:style-name="Normal">          &lt;/div&gt;</text:p>
      <text:p text:style-name="Normal">        &lt;/motion.div&gt;</text:p>
      <text:p text:style-name="Normal">      &lt;/div&gt;</text:p>
      <text:p text:style-name="Normal">    &lt;/section&gt;</text:p>
      <text:p text:style-name="Normal">  );</text:p>
      <text:p text:style-name="Normal">}</text:p>
      <text:p text:style-name="Normal"/>
      <text:soft-page-break/>
      <text:h text:style-name="P631" text:outline-level="2">!-----------------------------------------------------------------------------------!</text:h>
      <text:h text:style-name="P632" text:outline-level="2"/>
      <text:h text:style-name="P633" text:outline-level="2">Code Editor - src/components/mcc/Footer.jsx</text:h>
      <text:p text:style-name="Normal"><text:line-break/><text:line-break/>import React from 'react';</text:p>
      <text:p text:style-name="Normal">import { useLang } from './LanguageContext';</text:p>
      <text:p text:style-name="Normal"/>
      <text:p text:style-name="Normal">export default function Footer() {</text:p>
      <text:p text:style-name="Normal">  const { lang } = useLang();</text:p>
      <text:p text:style-name="Normal"/>
      <text:p text:style-name="Normal">  return (</text:p>
      <text:p text:style-name="Normal">    &lt;footer className="bg-[#0F0F1E] py-12 border-t border-white/5"&gt;</text:p>
      <text:p text:style-name="Normal">      &lt;div className="max-w-6xl mx-auto px-6"&gt;</text:p>
      <text:p text:style-name="Normal">        &lt;div className="flex flex-col sm:flex-row items-center justify-between gap-6"&gt;</text:p>
      <text:p text:style-name="Normal">          &lt;div className="flex flex-col"&gt;</text:p>
      <text:p text:style-name="Normal">            &lt;div className="flex items-center gap-3"&gt;</text:p>
      <text:p text:style-name="Normal">              &lt;div className="w-10 h-10 rounded-full bg-gradient-to-br from-[#C05621] to-[#D4A843] flex items-center justify-center flex-shrink-0"&gt;</text:p>
      <text:p text:style-name="Normal">                &lt;span className="text-white font-bold text-sm"&gt;MCC&lt;/span&gt;</text:p>
      <text:p text:style-name="Normal">              &lt;/div&gt;</text:p>
      <text:p text:style-name="Normal">              &lt;p className="text-[#FDF8F0] font-semibold text-sm leading-tight"&gt;Malalane Cultural Center&lt;/p&gt;</text:p>
      <text:p text:style-name="Normal">            &lt;/div&gt;</text:p>
      <text:p text:style-name="Normal">            &lt;p className="text-[#FDF8F0]/40 text-xs text-center -mt-2.5"&gt;</text:p>
      <text:p text:style-name="Normal">             <text:s/><text:span text:style-name="T634">{lang === 'en' ? 'Mozambique • Portugal • Canada' : 'Moçambique • Portugal • Canadá'}</text:span></text:p>
      <text:p text:style-name="Normal"><text:span text:style-name="T635">           <text:s/></text:span>&lt;/p&gt;</text:p>
      <text:soft-page-break/>
      <text:p text:style-name="Normal">          &lt;/div&gt;</text:p>
      <text:p text:style-name="Normal">          &lt;p className="text-[#FDF8F0]/30 text-xs"&gt;</text:p>
      <text:p text:style-name="Normal">            © {new Date().getFullYear()} Malalane Cultural Center. {lang === 'en' ? 'All rights reserved.' : 'Todos os direitos reservados.'}</text:p>
      <text:p text:style-name="Normal">          &lt;/p&gt;</text:p>
      <text:p text:style-name="Normal">        &lt;/div&gt;</text:p>
      <text:p text:style-name="Normal">      &lt;/div&gt;</text:p>
      <text:p text:style-name="Normal">    &lt;/footer&gt;</text:p>
      <text:p text:style-name="Normal">  );</text:p>
      <text:p text:style-name="Normal">}</text:p>
      <text:p text:style-name="Normal"><text:line-break/></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636"><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urelio Malalane</meta:initial-creator>
    <dc:creator>Aurelio Malalane</dc:creator>
    <meta:creation-date>2026-06-11T15:19:00Z</meta:creation-date>
    <dc:date>2026-06-11T15:57:00Z</dc:date>
    <meta:template xlink:href="Normal.dotm" xlink:type="simple"/>
    <meta:editing-cycles>1</meta:editing-cycles>
    <meta:editing-duration>PT2280S</meta:editing-duration>
    <meta:document-statistic meta:page-count="40" meta:paragraph-count="93" meta:word-count="6989" meta:character-count="46738" meta:row-count="332" meta:non-whitespace-character-count="39842"/>
  </office:meta>
</office:document-meta>
</file>